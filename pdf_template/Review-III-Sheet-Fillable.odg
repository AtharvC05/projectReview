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E0000008ED5C644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adea" svg:font-family="Calade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4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7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08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68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7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1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82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7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1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6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33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4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31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3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8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8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4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73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3cm" fo:min-width="3.67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41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3cm" svg:stroke-color="#000000" draw:stroke-linejoin="round" svg:stroke-linecap="butt" draw:fill="non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draw:stroke="none" draw:fill="solid" draw:fill-color="#000000" loext:decorative="false"/>
    </style:style>
    <style:style style:name="gr36" style:family="graphic" style:parent-style-name="standard">
      <style:graphic-properties draw:stroke="none" draw:fill="solid" draw:fill-color="#cfcdcd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7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24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28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3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60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34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1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11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82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4.83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0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07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3.1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0.506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d7d9d9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0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5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6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2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2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9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8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6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6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6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1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efefef" loext:decorative="fals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4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4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5.86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cfcdcd"/>
    </style:style>
    <style:style style:name="P1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solid" draw:fill-color="#d7d9d9"/>
    </style:style>
    <style:style style:name="P18" style:family="paragraph">
      <loext:graphic-properties draw:fill="solid" draw:fill-color="#efefef"/>
    </style:style>
    <style:style style:name="P19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Caladea" fo:font-size="13pt" fo:font-weight="bold" style:font-name-asian="Caladea" style:font-size-asian="13pt" style:font-weight-asian="bold" style:font-name-complex="Caladea" style:font-size-complex="13pt" style:font-weight-complex="bold"/>
    </style:style>
    <style:style style:name="T2" style:family="text">
      <style:text-properties fo:color="#000000" loext:opacity="100%" style:font-name="Caladea" fo:font-size="14pt" fo:font-weight="bold" style:font-name-asian="Caladea" style:font-size-asian="14pt" style:font-weight-asian="bold" style:font-name-complex="Caladea" style:font-size-complex="14pt" style:font-weight-complex="bold"/>
    </style:style>
    <style:style style:name="T3" style:family="text">
      <style:text-properties fo:color="#000000" loext:opacity="100%" style:font-name="Caladea" fo:font-size="18pt" fo:font-weight="bold" style:font-name-asian="Caladea" style:font-size-asian="18pt" style:font-weight-asian="bold" style:font-name-complex="Caladea" style:font-size-complex="18pt" style:font-weight-complex="bold"/>
    </style:style>
    <style:style style:name="T4" style:family="text">
      <style:text-properties fo:color="#000000" loext:opacity="100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 style:text-scale="120%"/>
    </style:style>
    <style:style style:name="T5" style:family="text">
      <style:text-properties fo:color="#000000" loext:opacity="100%" style:font-name="Times New Roman" fo:font-size="13pt" fo:font-weight="normal" style:font-name-asian="Times New Roman" style:font-size-asian="13pt" style:font-weight-asian="normal" style:font-name-complex="Times New Roman" style:font-size-complex="13pt" style:font-weight-complex="normal"/>
    </style:style>
    <style:style style:name="T6" style:family="text">
      <style:text-properties fo:color="#000000" loext:opacity="100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 style:text-scale="115%"/>
    </style:style>
    <style:style style:name="T7" style:family="text">
      <style:text-properties fo:color="#000000" loext:opacity="100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 style:text-scale="125%"/>
    </style:style>
    <style:style style:name="T8" style:family="text">
      <style:text-properties fo:color="#000000" loext:opacity="100%" style:font-name="Times New Roman" fo:font-size="13pt" fo:font-weight="normal" style:font-name-asian="Times New Roman" style:font-size-asian="13pt" style:font-weight-asian="normal" style:font-name-complex="Times New Roman" style:font-size-complex="13pt" style:font-weight-complex="normal" style:text-scale="120%"/>
    </style:style>
    <style:style style:name="T9" style:family="text">
      <style:text-properties fo:color="#000000" loext:opacity="100%" style:font-name="Times New Roman" fo:font-size="13pt" fo:font-weight="normal" style:font-name-asian="Times New Roman" style:font-size-asian="13pt" style:font-weight-asian="normal" style:font-name-complex="Times New Roman" style:font-size-complex="13pt" style:font-weight-complex="normal" style:text-scale="110%"/>
    </style:style>
    <style:style style:name="T10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10%"/>
    </style:style>
    <style:style style:name="T1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 style:text-scale="120%"/>
    </style:style>
    <style:style style:name="T12" style:family="text">
      <style:text-properties fo:color="#000000" loext:opacity="100%"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 style:text-scale="120%"/>
    </style:style>
    <style:style style:name="T13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 style:text-scale="110%"/>
    </style:style>
    <style:style style:name="T14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6" style:family="text">
      <style:text-properties fo:color="#ffffff" loext:opacity="100%" style:font-name="Trebuchet MS" fo:font-size="16pt" fo:font-weight="bold" style:font-name-asian="Trebuchet MS" style:font-size-asian="16pt" style:font-weight-asian="bold" style:font-name-complex="Trebuchet MS" style:font-size-complex="16pt" style:font-weight-complex="bold" style:text-scale="125%"/>
    </style:style>
    <style:style style:name="T17" style:family="text">
      <style:text-properties fo:color="#000000" loext:opacity="100%" style:font-name="Caladea" fo:font-size="12pt" fo:font-weight="bold" style:font-name-asian="Caladea" style:font-size-asian="12pt" style:font-weight-asian="bold" style:font-name-complex="Caladea" style:font-size-complex="12pt" style:font-weight-complex="bold"/>
    </style:style>
    <style:style style:name="T18" style:family="text">
      <style:text-properties fo:color="#000000" loext:opacity="100%" style:font-name="Caladea" fo:font-size="16pt" fo:font-weight="bold" style:font-name-asian="Caladea" style:font-size-asian="16pt" style:font-weight-asian="bold" style:font-name-complex="Caladea" style:font-size-complex="16pt" style:font-weight-complex="bold"/>
    </style:style>
    <style:style style:name="T19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 style:text-scale="120%"/>
    </style:style>
    <style:style style:name="T20" style:family="text">
      <style:text-properties fo:color="#c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 style:text-scale="120%"/>
    </style:style>
    <style:style style:name="T2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 style:text-scale="125%"/>
    </style:style>
    <style:style style:name="T2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20%"/>
    </style:style>
    <style:style style:name="T2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15%"/>
    </style:style>
    <style:style style:name="T24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05%"/>
    </style:style>
    <style:style style:name="T25" style:family="text">
      <style:text-properties fo:color="#000000" loext:opacity="100%" style:font-name="Trebuchet MS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26" style:family="text">
      <style:text-properties fo:color="#be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 style:text-scale="120%"/>
    </style:style>
    <style:style style:name="T27" style:family="text">
      <style:text-properties fo:color="#000000" loext:opacity="100%" style:font-name="Trebuchet MS" fo:font-size="12pt" fo:font-weight="normal" style:font-name-asian="Trebuchet MS" style:font-size-asian="12pt" style:font-weight-asian="normal" style:font-name-complex="Trebuchet M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2" draw:text-style-name="P1" draw:layer="layout" svg:width="21.588cm" svg:height="27.939cm" svg:x="0cm" svg:y="-0.097cm" svg:viewBox="0 0 21589 27940" draw:points="0,0 21589,0 21589,27940 0,27940">
          <text:p/>
        </draw:polygon>
        <draw:frame draw:style-name="gr3" draw:text-style-name="P2" draw:layer="layout" svg:width="1.506cm" svg:height="1.65cm" svg:x="3.789cm" svg:y="1.136cm">
          <draw:image xlink:href="Pictures/100000010000007E0000008ED5C64468.png" xlink:type="simple" xlink:show="embed" xlink:actuate="onLoad" draw:mime-type="image/png">
            <text:p/>
          </draw:image>
        </draw:frame>
        <draw:frame draw:style-name="gr4" draw:text-style-name="P4" draw:layer="layout" svg:width="2.349cm" svg:height="0.526cm" svg:x="4.826cm" svg:y="3.907cm">
          <draw:text-box>
            <text:p text:style-name="P3"><text:span text:style-name="T1">Class: BE </text:span><text:span text:style-name="T1">IT</text:span></text:p>
          </draw:text-box>
        </draw:frame>
        <draw:frame draw:style-name="gr5" draw:text-style-name="P5" draw:layer="layout" svg:width="4.177cm" svg:height="0.569cm" svg:x="10.306cm" svg:y="0.825cm">
          <draw:text-box>
            <text:p text:style-name="P3"><text:span text:style-name="T2">Hope </text:span><text:span text:style-name="T2">Foundation'</text:span><text:span text:style-name="T2">s</text:span></text:p>
          </draw:text-box>
        </draw:frame>
        <draw:frame draw:style-name="gr5" draw:text-style-name="P5" draw:layer="layout" svg:width="12.469cm" svg:height="0.569cm" svg:x="5.9cm" svg:y="1.73cm">
          <draw:text-box>
            <text:p text:style-name="P3"><text:span text:style-name="T2">Internatio</text:span><text:span text:style-name="T2">nal </text:span><text:span text:style-name="T2">Institute of </text:span><text:span text:style-name="T2">Informatio</text:span><text:span text:style-name="T2">n </text:span><text:span text:style-name="T2">Technolog</text:span><text:span text:style-name="T2">y, Pune</text:span></text:p>
          </draw:text-box>
        </draw:frame>
        <draw:frame draw:style-name="gr6" draw:text-style-name="P6" draw:layer="layout" svg:width="11.21cm" svg:height="0.734cm" svg:x="6.95cm" svg:y="2.355cm">
          <draw:text-box>
            <text:p text:style-name="P3"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/text:p>
          </draw:text-box>
        </draw:frame>
        <draw:frame draw:style-name="gr4" draw:text-style-name="P4" draw:layer="layout" svg:width="4.74cm" svg:height="0.526cm" svg:x="9.012cm" svg:y="3.088cm">
          <draw:text-box>
            <text:p text:style-name="P3"><text:span text:style-name="T1">Academic </text:span><text:span text:style-name="T1">Year:2025-26</text:span></text:p>
          </draw:text-box>
        </draw:frame>
        <draw:frame draw:style-name="gr4" draw:text-style-name="P4" draw:layer="layout" svg:width="1.33cm" svg:height="0.526cm" svg:x="10.354cm" svg:y="3.907cm">
          <draw:text-box>
            <text:p text:style-name="P3"><text:span text:style-name="T1">SEM-II</text:span></text:p>
          </draw:text-box>
        </draw:frame>
        <draw:frame draw:style-name="gr4" draw:text-style-name="P4" draw:layer="layout" svg:width="3.654cm" svg:height="0.526cm" svg:x="9.373cm" svg:y="4.531cm">
          <draw:text-box>
            <text:p text:style-name="P3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I</text:span><text:span text:style-name="T1">I</text:span><text:span text:style-name="T1">I</text:span></text:p>
          </draw:text-box>
        </draw:frame>
        <draw:frame draw:style-name="gr4" draw:text-style-name="P4" draw:layer="layout" svg:width="1.276cm" svg:height="0.526cm" svg:x="14.406cm" svg:y="3.91cm">
          <draw:text-box>
            <text:p text:style-name="P3"><text:span text:style-name="T1">Date: <text:s/></text:span></text:p>
          </draw:text-box>
        </draw:frame>
        <draw:frame draw:style-name="gr7" draw:text-style-name="P4" draw:layer="layout" svg:width="1.864cm" svg:height="0.505cm" svg:x="15.617cm" svg:y="3.762cm">
          <draw:text-box>
            <text:p text:style-name="P3"><text:span text:style-name="T4">{{date}}</text:span></text:p>
          </draw:text-box>
        </draw:frame>
        <draw:frame draw:style-name="gr8" draw:text-style-name="P7" draw:layer="layout" svg:width="2.521cm" svg:height="0.505cm" svg:x="2.501cm" svg:y="5.617cm">
          <draw:text-box>
            <text:p text:style-name="P3"><text:span text:style-name="T4">Group Id :</text:span></text:p>
          </draw:text-box>
        </draw:frame>
        <draw:frame draw:style-name="gr9" draw:text-style-name="P7" draw:layer="layout" svg:width="2.874cm" svg:height="0.505cm" svg:x="5.972cm" svg:y="5.541cm">
          <draw:text-box>
            <text:p text:style-name="P3"><text:span text:style-name="T5"><text:s text:c="3"/>{{group_id}}</text:span></text:p>
          </draw:text-box>
        </draw:frame>
        <draw:frame draw:style-name="gr10" draw:text-style-name="P7" draw:layer="layout" svg:width="3.41cm" svg:height="0.505cm" svg:x="15.021cm" svg:y="5.607cm">
          <draw:text-box>
            <text:p text:style-name="P3"><text:span text:style-name="T4">Date :</text:span></text:p>
          </draw:text-box>
        </draw:frame>
        <draw:frame draw:style-name="gr11" draw:text-style-name="P7" draw:layer="layout" svg:width="7.081cm" svg:height="0.505cm" svg:x="2.514cm" svg:y="6.654cm">
          <draw:text-box>
            <text:p text:style-name="P3"><text:span text:style-name="T6">Project Title : <text:s text:c="2"/></text:span></text:p>
          </draw:text-box>
        </draw:frame>
        <draw:frame draw:style-name="gr12" draw:text-style-name="P7" draw:layer="layout" svg:width="0.685cm" svg:height="0.505cm" svg:x="2.455cm" svg:y="8.375cm">
          <draw:text-box>
            <text:p text:style-name="P3"><text:span text:style-name="T4">Sr.</text:span></text:p>
          </draw:text-box>
        </draw:frame>
        <draw:frame draw:style-name="gr13" draw:text-style-name="P7" draw:layer="layout" svg:width="0.775cm" svg:height="0.505cm" svg:x="2.392cm" svg:y="8.882cm">
          <draw:text-box>
            <text:p text:style-name="P3"><text:span text:style-name="T6">No.</text:span></text:p>
          </draw:text-box>
        </draw:frame>
        <draw:frame draw:style-name="gr14" draw:text-style-name="P7" draw:layer="layout" svg:width="1.913cm" svg:height="0.505cm" svg:x="3.738cm" svg:y="8.375cm">
          <draw:text-box>
            <text:p text:style-name="P3"><text:span text:style-name="T4">Roll </text:span><text:span text:style-name="T4">No.</text:span></text:p>
          </draw:text-box>
        </draw:frame>
        <draw:frame draw:style-name="gr15" draw:text-style-name="P7" draw:layer="layout" svg:width="1.823cm" svg:height="0.505cm" svg:x="6.205cm" svg:y="8.375cm">
          <draw:text-box>
            <text:p text:style-name="P3"><text:span text:style-name="T4">Student</text:span></text:p>
          </draw:text-box>
        </draw:frame>
        <draw:frame draw:style-name="gr16" draw:text-style-name="P7" draw:layer="layout" svg:width="1.573cm" svg:height="0.505cm" svg:x="7.899cm" svg:y="8.375cm">
          <draw:text-box>
            <text:p text:style-name="P3"><text:span text:style-name="T7"><text:s/>Name</text:span></text:p>
          </draw:text-box>
        </draw:frame>
        <draw:frame draw:style-name="gr17" draw:text-style-name="P7" draw:layer="layout" svg:width="1.912cm" svg:height="0.505cm" svg:x="11.434cm" svg:y="8.375cm">
          <draw:text-box>
            <text:p text:style-name="P3"><text:span text:style-name="T6">Contact </text:span></text:p>
          </draw:text-box>
        </draw:frame>
        <draw:frame draw:style-name="gr18" draw:text-style-name="P7" draw:layer="layout" svg:width="1.61cm" svg:height="0.505cm" svg:x="11.434cm" svg:y="8.88cm">
          <draw:text-box>
            <text:p text:style-name="P3"><text:span text:style-name="T4">Details</text:span></text:p>
          </draw:text-box>
        </draw:frame>
        <draw:frame draw:style-name="gr19" draw:text-style-name="P7" draw:layer="layout" svg:width="4.332cm" svg:height="0.505cm" svg:x="15.372cm" svg:y="8.375cm">
          <draw:text-box>
            <text:p text:style-name="P3"><text:span text:style-name="T6">Intern</text:span><text:span text:style-name="T6">al / </text:span><text:span text:style-name="T6">Extern</text:span><text:span text:style-name="T6">al </text:span></text:p>
          </draw:text-box>
        </draw:frame>
        <draw:frame draw:style-name="gr20" draw:text-style-name="P7" draw:layer="layout" svg:width="3.05cm" svg:height="0.505cm" svg:x="15.937cm" svg:y="8.88cm">
          <draw:text-box>
            <text:p text:style-name="P3"><text:span text:style-name="T6">Guide Details</text:span></text:p>
          </draw:text-box>
        </draw:frame>
        <draw:frame draw:style-name="gr21" draw:text-style-name="P7" draw:layer="layout" svg:width="0.548cm" svg:height="0.505cm" svg:x="2.658cm" svg:y="9.796cm">
          <draw:text-box>
            <text:p text:style-name="P3"><text:span text:style-name="T8">1</text:span></text:p>
          </draw:text-box>
        </draw:frame>
        <draw:frame draw:style-name="gr22" draw:text-style-name="P7" draw:layer="layout" svg:width="5.313cm" svg:height="0.505cm" svg:x="3.431cm" svg:y="9.765cm">
          <draw:text-box>
            <text:p text:style-name="P3"><text:span text:style-name="T5"><text:s text:c="2"/>{{roll_1}} <text:s text:c="3"/></text:span><text:span text:style-name="T5">{{student_1}}</text:span></text:p>
          </draw:text-box>
        </draw:frame>
        <draw:frame draw:style-name="gr23" draw:text-style-name="P7" draw:layer="layout" svg:width="3cm" svg:height="0.505cm" svg:x="10.822cm" svg:y="9.765cm">
          <draw:text-box>
            <text:p text:style-name="P3"><text:span text:style-name="T5"><text:s text:c="3"/>{{contact_1}}</text:span></text:p>
          </draw:text-box>
        </draw:frame>
        <draw:frame draw:style-name="gr24" draw:text-style-name="P7" draw:layer="layout" svg:width="3.08cm" svg:height="0.505cm" svg:x="14.84cm" svg:y="9.687cm">
          <draw:text-box>
            <text:p text:style-name="P3"><text:span text:style-name="T9">G</text:span><text:span text:style-name="T9">u</text:span><text:span text:style-name="T9">i</text:span><text:span text:style-name="T9">d</text:span><text:span text:style-name="T9">e</text:span><text:span text:style-name="T9"> </text:span><text:span text:style-name="T9">N</text:span><text:span text:style-name="T9">a</text:span><text:span text:style-name="T9">m</text:span><text:span text:style-name="T9">e</text:span><text:span text:style-name="T9"> </text:span><text:span text:style-name="T9">: </text:span><text:span text:style-name="T9"><text:s/></text:span></text:p>
          </draw:text-box>
        </draw:frame>
        <draw:frame draw:style-name="gr25" draw:text-style-name="P7" draw:layer="layout" svg:width="3.431cm" svg:height="0.505cm" svg:x="14.84cm" svg:y="10.22cm">
          <draw:text-box>
            <text:p text:style-name="P3"><text:span text:style-name="T9">{</text:span><text:span text:style-name="T9">{</text:span><text:span text:style-name="T9">g</text:span><text:span text:style-name="T9">u</text:span><text:span text:style-name="T9">i</text:span><text:span text:style-name="T9">d</text:span><text:span text:style-name="T9">e</text:span><text:span text:style-name="T9">_</text:span><text:span text:style-name="T9">n</text:span><text:span text:style-name="T9">a</text:span><text:span text:style-name="T9">m</text:span><text:span text:style-name="T9">e</text:span><text:span text:style-name="T9">}</text:span><text:span text:style-name="T9">}</text:span></text:p>
          </draw:text-box>
        </draw:frame>
        <draw:frame draw:style-name="gr21" draw:text-style-name="P7" draw:layer="layout" svg:width="0.548cm" svg:height="0.505cm" svg:x="2.658cm" svg:y="11.001cm">
          <draw:text-box>
            <text:p text:style-name="P3"><text:span text:style-name="T8">2</text:span></text:p>
          </draw:text-box>
        </draw:frame>
        <draw:frame draw:style-name="gr26" draw:text-style-name="P7" draw:layer="layout" svg:width="2.086cm" svg:height="0.505cm" svg:x="3.431cm" svg:y="10.971cm">
          <draw:text-box>
            <text:p text:style-name="P3"><text:span text:style-name="T5"><text:s/>{{roll_2}}</text:span></text:p>
          </draw:text-box>
        </draw:frame>
        <draw:frame draw:style-name="gr27" draw:text-style-name="P7" draw:layer="layout" svg:width="2.886cm" svg:height="0.505cm" svg:x="5.821cm" svg:y="10.971cm">
          <draw:text-box>
            <text:p text:style-name="P3"><text:span text:style-name="T5"><text:s text:c="2"/>{{student_2}}</text:span></text:p>
          </draw:text-box>
        </draw:frame>
        <draw:frame draw:style-name="gr27" draw:text-style-name="P7" draw:layer="layout" svg:width="2.886cm" svg:height="0.505cm" svg:x="10.822cm" svg:y="10.971cm">
          <draw:text-box>
            <text:p text:style-name="P3"><text:span text:style-name="T5"><text:s text:c="2"/>{{contact_2}}</text:span></text:p>
          </draw:text-box>
        </draw:frame>
        <draw:frame draw:style-name="gr28" draw:text-style-name="P8" draw:layer="layout" svg:width="4.347cm" svg:height="0.471cm" svg:x="14.847cm" svg:y="10.992cm">
          <draw:text-box>
            <text:p text:style-name="P3"><text:span text:style-name="T10">Mentor Name, </text:span><text:span text:style-name="T10">email &amp;</text:span></text:p>
          </draw:text-box>
        </draw:frame>
        <draw:frame draw:style-name="gr29" draw:text-style-name="P7" draw:layer="layout" svg:width="0.502cm" svg:height="0.505cm" svg:x="19.192cm" svg:y="10.96cm">
          <draw:text-box>
            <text:p text:style-name="P3"><text:span text:style-name="T9"><text:s/></text:span></text:p>
          </draw:text-box>
        </draw:frame>
        <draw:frame draw:style-name="gr30" draw:text-style-name="P8" draw:layer="layout" svg:width="2.628cm" svg:height="0.471cm" svg:x="14.855cm" svg:y="11.41cm">
          <draw:text-box>
            <text:p text:style-name="P3"><text:span text:style-name="T10">Mobile <text:s/>No. : </text:span></text:p>
          </draw:text-box>
        </draw:frame>
        <draw:frame draw:style-name="gr31" draw:text-style-name="P7" draw:layer="layout" svg:width="3.739cm" svg:height="0.571cm" svg:x="14.855cm" svg:y="12.018cm">
          <draw:text-box>
            <text:p text:style-name="P3"><text:span text:style-name="T9">{{mentor_name}</text:span><text:span text:style-name="T9">}</text:span></text:p>
          </draw:text-box>
        </draw:frame>
        <draw:frame draw:style-name="gr32" draw:text-style-name="P7" draw:layer="layout" svg:width="3.673cm" svg:height="0.613cm" svg:x="14.847cm" svg:y="12.575cm">
          <draw:text-box>
            <text:p text:style-name="P3"><text:span text:style-name="T5">{{mentor_mobile}</text:span><text:span text:style-name="T5">}</text:span></text:p>
          </draw:text-box>
        </draw:frame>
        <draw:frame draw:style-name="gr33" draw:text-style-name="P7" draw:layer="layout" svg:width="3.419cm" svg:height="0.581cm" svg:x="14.87cm" svg:y="13.187cm">
          <draw:text-box>
            <text:p text:style-name="P3"><text:span text:style-name="T5">{{mentor_email}}</text:span></text:p>
          </draw:text-box>
        </draw:frame>
        <draw:frame draw:style-name="gr21" draw:text-style-name="P7" draw:layer="layout" svg:width="0.548cm" svg:height="0.505cm" svg:x="2.658cm" svg:y="11.895cm">
          <draw:text-box>
            <text:p text:style-name="P3"><text:span text:style-name="T8">3</text:span></text:p>
          </draw:text-box>
        </draw:frame>
        <draw:frame draw:style-name="gr26" draw:text-style-name="P7" draw:layer="layout" svg:width="2.086cm" svg:height="0.505cm" svg:x="3.431cm" svg:y="11.86cm">
          <draw:text-box>
            <text:p text:style-name="P3"><text:span text:style-name="T5"><text:s/>{{roll_3}}</text:span></text:p>
          </draw:text-box>
        </draw:frame>
        <draw:line draw:style-name="gr34" draw:text-style-name="P2" draw:layer="layout" svg:x1="2.055cm" svg:y1="5.388cm" svg:x2="20.432cm" svg:y2="5.388cm">
          <text:p/>
        </draw:line>
        <draw:line draw:style-name="gr34" draw:text-style-name="P2" draw:layer="layout" svg:x1="2.089cm" svg:y1="6.419cm" svg:x2="20.397cm" svg:y2="6.419cm">
          <text:p/>
        </draw:line>
        <draw:line draw:style-name="gr34" draw:text-style-name="P2" draw:layer="layout" svg:x1="2.089cm" svg:y1="8.173cm" svg:x2="20.397cm" svg:y2="8.173cm">
          <text:p/>
        </draw:line>
        <draw:line draw:style-name="gr34" draw:text-style-name="P2" draw:layer="layout" svg:x1="2.089cm" svg:y1="9.599cm" svg:x2="20.397cm" svg:y2="9.599cm">
          <text:p/>
        </draw:line>
        <draw:line draw:style-name="gr34" draw:text-style-name="P2" draw:layer="layout" svg:x1="2.089cm" svg:y1="10.803cm" svg:x2="20.397cm" svg:y2="10.803cm">
          <text:p/>
        </draw:line>
        <draw:line draw:style-name="gr34" draw:text-style-name="P2" draw:layer="layout" svg:x1="2.089cm" svg:y1="11.69cm" svg:x2="14.581cm" svg:y2="11.69cm">
          <text:p/>
        </draw:line>
        <draw:line draw:style-name="gr34" draw:text-style-name="P2" draw:layer="layout" svg:x1="2.089cm" svg:y1="12.581cm" svg:x2="14.581cm" svg:y2="12.581cm">
          <text:p/>
        </draw:line>
        <draw:line draw:style-name="gr34" draw:text-style-name="P2" draw:layer="layout" svg:x1="2.075cm" svg:y1="5.368cm" svg:x2="2.06cm" svg:y2="13.877cm">
          <text:p/>
        </draw:line>
        <draw:line draw:style-name="gr34" draw:text-style-name="P2" draw:layer="layout" svg:x1="3.433cm" svg:y1="8.174cm" svg:x2="3.44cm" svg:y2="13.87cm">
          <text:p/>
        </draw:line>
        <draw:line draw:style-name="gr34" draw:text-style-name="P2" draw:layer="layout" svg:x1="5.818cm" svg:y1="5.409cm" svg:x2="5.818cm" svg:y2="6.437cm">
          <text:p/>
        </draw:line>
        <draw:line draw:style-name="gr34" draw:text-style-name="P2" draw:layer="layout" svg:x1="5.82cm" svg:y1="8.153cm" svg:x2="5.803cm" svg:y2="13.852cm">
          <text:p/>
        </draw:line>
        <draw:line draw:style-name="gr34" draw:text-style-name="P2" draw:layer="layout" svg:x1="10.84cm" svg:y1="8.462cm" svg:x2="10.814cm" svg:y2="13.869cm">
          <text:p/>
        </draw:line>
        <draw:line draw:style-name="gr34" draw:text-style-name="P2" draw:layer="layout" svg:x1="14.564cm" svg:y1="5.409cm" svg:x2="14.564cm" svg:y2="6.437cm">
          <text:p/>
        </draw:line>
        <draw:line draw:style-name="gr34" draw:text-style-name="P2" draw:layer="layout" svg:x1="14.579cm" svg:y1="8.159cm" svg:x2="14.562cm" svg:y2="13.861cm">
          <text:p/>
        </draw:line>
        <draw:line draw:style-name="gr34" draw:text-style-name="P2" draw:layer="layout" svg:x1="20.421cm" svg:y1="5.388cm" svg:x2="20.415cm" svg:y2="13.89cm">
          <text:p/>
        </draw:line>
        <draw:polygon draw:style-name="gr35" draw:text-style-name="P9" draw:layer="layout" svg:width="5.654cm" svg:height="0.636cm" svg:x="2.113cm" svg:y="14.416cm" svg:viewBox="0 0 5655 637" draw:points="0,0 5655,0 5655,637 0,637">
          <text:p/>
        </draw:polygon>
        <draw:frame draw:style-name="gr27" draw:text-style-name="P7" draw:layer="layout" svg:width="2.886cm" svg:height="0.505cm" svg:x="5.821cm" svg:y="11.86cm">
          <draw:text-box>
            <text:p text:style-name="P3"><text:span text:style-name="T5"><text:s text:c="2"/>{{student_3}}</text:span></text:p>
          </draw:text-box>
        </draw:frame>
        <draw:polygon draw:style-name="gr35" draw:text-style-name="P9" draw:layer="layout" svg:width="0.161cm" svg:height="0.636cm" svg:x="7.767cm" svg:y="14.416cm" svg:viewBox="0 0 162 637" draw:points="0,0 162,0 162,637 0,637">
          <text:p/>
        </draw:polygon>
        <draw:polygon draw:style-name="gr35" draw:text-style-name="P9" draw:layer="layout" svg:width="0.664cm" svg:height="0.636cm" svg:x="7.928cm" svg:y="14.416cm" svg:viewBox="0 0 665 637" draw:points="0,0 665,0 665,637 0,637">
          <text:p/>
        </draw:polygon>
        <draw:polygon draw:style-name="gr35" draw:text-style-name="P9" draw:layer="layout" svg:width="0.162cm" svg:height="0.636cm" svg:x="8.592cm" svg:y="14.416cm" svg:viewBox="0 0 163 637" draw:points="0,0 163,0 163,637 0,637">
          <text:p/>
        </draw:polygon>
        <draw:polygon draw:style-name="gr35" draw:text-style-name="P9" draw:layer="layout" svg:width="0.202cm" svg:height="0.636cm" svg:x="8.754cm" svg:y="14.416cm" svg:viewBox="0 0 203 637" draw:points="0,0 203,0 203,637 0,637">
          <text:p/>
        </draw:polygon>
        <draw:polygon draw:style-name="gr35" draw:text-style-name="P9" draw:layer="layout" svg:width="0.164cm" svg:height="0.636cm" svg:x="8.956cm" svg:y="14.416cm" svg:viewBox="0 0 165 637" draw:points="0,0 165,0 165,637 0,637">
          <text:p/>
        </draw:polygon>
        <draw:polygon draw:style-name="gr35" draw:text-style-name="P9" draw:layer="layout" svg:width="4.523cm" svg:height="0.636cm" svg:x="9.12cm" svg:y="14.416cm" svg:viewBox="0 0 4524 637" draw:points="0,0 4524,0 4524,637 0,637">
          <text:p/>
        </draw:polygon>
        <draw:polygon draw:style-name="gr35" draw:text-style-name="P9" draw:layer="layout" svg:width="0.162cm" svg:height="0.636cm" svg:x="13.643cm" svg:y="14.416cm" svg:viewBox="0 0 163 637" draw:points="0,0 163,0 163,637 0,637">
          <text:p/>
        </draw:polygon>
        <draw:polygon draw:style-name="gr35" draw:text-style-name="P9" draw:layer="layout" svg:width="0.646cm" svg:height="0.636cm" svg:x="13.805cm" svg:y="14.416cm" svg:viewBox="0 0 647 637" draw:points="0,0 647,0 647,637 0,637">
          <text:p/>
        </draw:polygon>
        <draw:polygon draw:style-name="gr35" draw:text-style-name="P9" draw:layer="layout" svg:width="0.162cm" svg:height="0.636cm" svg:x="14.451cm" svg:y="14.416cm" svg:viewBox="0 0 163 637" draw:points="0,0 163,0 163,637 0,637">
          <text:p/>
        </draw:polygon>
        <draw:polygon draw:style-name="gr35" draw:text-style-name="P9" draw:layer="layout" svg:width="5.744cm" svg:height="0.636cm" svg:x="14.613cm" svg:y="14.416cm" svg:viewBox="0 0 5745 637" draw:points="0,0 5745,0 5745,637 0,637">
          <text:p/>
        </draw:polygon>
        <draw:polygon draw:style-name="gr35" draw:text-style-name="P9" draw:layer="layout" svg:width="0.006cm" svg:height="0.636cm" svg:x="16.076cm" svg:y="14.416cm" svg:viewBox="0 0 7 637" draw:points="0,0 7,0 7,637 0,637">
          <text:p/>
        </draw:polygon>
        <draw:polygon draw:style-name="gr36" draw:text-style-name="P10" draw:layer="layout" svg:width="4.449cm" svg:height="0.557cm" svg:x="2.602cm" svg:y="15.466cm" svg:viewBox="0 0 4450 558" draw:points="0,0 4450,0 4450,558 0,558">
          <text:p/>
        </draw:polygon>
        <draw:frame draw:style-name="gr27" draw:text-style-name="P7" draw:layer="layout" svg:width="2.886cm" svg:height="0.505cm" svg:x="10.822cm" svg:y="11.86cm">
          <draw:text-box>
            <text:p text:style-name="P3"><text:span text:style-name="T5"><text:s text:c="2"/>{{contact_3}}</text:span></text:p>
          </draw:text-box>
        </draw:frame>
        <draw:polygon draw:style-name="gr36" draw:text-style-name="P10" draw:layer="layout" svg:width="0.115cm" svg:height="0.557cm" svg:x="7.051cm" svg:y="15.466cm" svg:viewBox="0 0 116 558" draw:points="0,0 116,0 116,558 0,558">
          <text:p/>
        </draw:polygon>
        <draw:polygon draw:style-name="gr36" draw:text-style-name="P10" draw:layer="layout" svg:width="0.032cm" svg:height="0.557cm" svg:x="7.166cm" svg:y="15.466cm" svg:viewBox="0 0 33 558" draw:points="0,0 33,0 33,558 0,558">
          <text:p/>
        </draw:polygon>
        <draw:polygon draw:style-name="gr36" draw:text-style-name="P10" draw:layer="layout" svg:width="2.095cm" svg:height="0.557cm" svg:x="7.198cm" svg:y="15.466cm" svg:viewBox="0 0 2096 558" draw:points="0,0 2096,0 2096,558 0,558">
          <text:p/>
        </draw:polygon>
        <draw:polygon draw:style-name="gr36" draw:text-style-name="P10" draw:layer="layout" svg:width="0.116cm" svg:height="0.557cm" svg:x="9.293cm" svg:y="15.466cm" svg:viewBox="0 0 117 558" draw:points="0,0 117,0 117,558 0,558">
          <text:p/>
        </draw:polygon>
        <draw:polygon draw:style-name="gr36" draw:text-style-name="P10" draw:layer="layout" svg:width="0.027cm" svg:height="0.557cm" svg:x="9.411cm" svg:y="15.466cm" svg:viewBox="0 0 28 558" draw:points="0,0 28,0 28,558 0,558">
          <text:p/>
        </draw:polygon>
        <draw:polygon draw:style-name="gr36" draw:text-style-name="P10" draw:layer="layout" svg:width="1.345cm" svg:height="0.557cm" svg:x="9.438cm" svg:y="15.466cm" svg:viewBox="0 0 1346 558" draw:points="0,0 1346,0 1346,558 0,558">
          <text:p/>
        </draw:polygon>
        <draw:polygon draw:style-name="gr36" draw:text-style-name="P10" draw:layer="layout" svg:width="0.115cm" svg:height="0.557cm" svg:x="10.783cm" svg:y="15.466cm" svg:viewBox="0 0 116 558" draw:points="0,0 116,0 116,558 0,558">
          <text:p/>
        </draw:polygon>
        <draw:polygon draw:style-name="gr36" draw:text-style-name="P10" draw:layer="layout" svg:width="0.035cm" svg:height="0.557cm" svg:x="10.898cm" svg:y="15.466cm" svg:viewBox="0 0 36 558" draw:points="0,0 36,0 36,558 0,558">
          <text:p/>
        </draw:polygon>
        <draw:polygon draw:style-name="gr36" draw:text-style-name="P10" draw:layer="layout" svg:width="1.94cm" svg:height="0.557cm" svg:x="10.93cm" svg:y="15.466cm" svg:viewBox="0 0 1941 558" draw:points="0,0 1941,0 1941,558 0,558">
          <text:p/>
        </draw:polygon>
        <draw:polygon draw:style-name="gr36" draw:text-style-name="P10" draw:layer="layout" svg:width="0.114cm" svg:height="0.557cm" svg:x="12.872cm" svg:y="15.466cm" svg:viewBox="0 0 115 558" draw:points="0,0 115,0 115,558 0,558">
          <text:p/>
        </draw:polygon>
        <draw:polygon draw:style-name="gr36" draw:text-style-name="P10" draw:layer="layout" svg:width="0.026cm" svg:height="0.557cm" svg:x="12.988cm" svg:y="15.466cm" svg:viewBox="0 0 27 558" draw:points="0,0 27,0 27,558 0,558">
          <text:p/>
        </draw:polygon>
        <draw:polygon draw:style-name="gr36" draw:text-style-name="P10" draw:layer="layout" svg:width="2.888cm" svg:height="0.557cm" svg:x="13.016cm" svg:y="15.466cm" svg:viewBox="0 0 2889 558" draw:points="0,0 2889,0 2889,558 0,558">
          <text:p/>
        </draw:polygon>
        <draw:polygon draw:style-name="gr36" draw:text-style-name="P10" draw:layer="layout" svg:width="3.146cm" svg:height="0.557cm" svg:x="15.903cm" svg:y="15.466cm" svg:viewBox="0 0 3147 558" draw:points="0,0 3147,0 3147,558 0,558">
          <text:p/>
        </draw:polygon>
        <draw:frame draw:style-name="gr21" draw:text-style-name="P7" draw:layer="layout" svg:width="0.548cm" svg:height="0.505cm" svg:x="2.658cm" svg:y="12.735cm">
          <draw:text-box>
            <text:p text:style-name="P3"><text:span text:style-name="T8">4</text:span></text:p>
          </draw:text-box>
        </draw:frame>
        <draw:frame draw:style-name="gr26" draw:text-style-name="P7" draw:layer="layout" svg:width="2.086cm" svg:height="0.505cm" svg:x="3.431cm" svg:y="12.74cm">
          <draw:text-box>
            <text:p text:style-name="P3"><text:span text:style-name="T5"><text:s/>{{roll_4}}</text:span></text:p>
          </draw:text-box>
        </draw:frame>
        <draw:frame draw:style-name="gr27" draw:text-style-name="P7" draw:layer="layout" svg:width="2.886cm" svg:height="0.505cm" svg:x="5.821cm" svg:y="12.74cm">
          <draw:text-box>
            <text:p text:style-name="P3"><text:span text:style-name="T5"><text:s text:c="2"/>{{student_4}}</text:span></text:p>
          </draw:text-box>
        </draw:frame>
        <draw:frame draw:style-name="gr27" draw:text-style-name="P7" draw:layer="layout" svg:width="2.886cm" svg:height="0.505cm" svg:x="10.822cm" svg:y="12.74cm">
          <draw:text-box>
            <text:p text:style-name="P3"><text:span text:style-name="T5"><text:s text:c="2"/>{{contact_4}}</text:span></text:p>
          </draw:text-box>
        </draw:frame>
        <draw:frame draw:style-name="gr37" draw:text-style-name="P11" draw:layer="layout" svg:width="16.978cm" svg:height="0.547cm" svg:x="2.606cm" svg:y="15.488cm">
          <draw:text-box>
            <text:p text:style-name="P3"><text:span text:style-name="T11">IMPLEMEN</text:span><text:span text:style-name="T11">TATION </text:span><text:span text:style-name="T11">(SOURCE </text:span><text:span text:style-name="T11">CODE) <text:s/></text:span><text:span text:style-name="T11">REVIEW </text:span><text:span text:style-name="T11">CHECKLIS</text:span><text:span text:style-name="T11">T</text:span></text:p>
          </draw:text-box>
        </draw:frame>
        <draw:frame draw:style-name="gr38" draw:text-style-name="P12" draw:layer="layout" svg:width="3.247cm" svg:height="0.585cm" svg:x="2.444cm" svg:y="16.531cm">
          <draw:text-box>
            <text:p text:style-name="P3"><text:span text:style-name="T12">a. Structure</text:span></text:p>
          </draw:text-box>
        </draw:frame>
        <draw:frame draw:style-name="gr39" draw:text-style-name="P11" draw:layer="layout" svg:width="14.287cm" svg:height="0.547cm" svg:x="2.444cm" svg:y="17.559cm">
          <draw:text-box>
            <text:p text:style-name="P3"><text:span text:style-name="T13">1. Does the </text:span><text:span text:style-name="T13">code </text:span><text:span text:style-name="T13">completely and </text:span><text:span text:style-name="T13">correctly </text:span><text:span text:style-name="T13">implement the </text:span><text:span text:style-name="T13">design?</text:span></text:p>
          </draw:text-box>
        </draw:frame>
        <draw:frame draw:style-name="gr40" draw:text-style-name="P8" draw:layer="layout" svg:width="0.955cm" svg:height="0.471cm" svg:x="16.855cm" svg:y="17.586cm">
          <draw:text-box>
            <text:p text:style-name="P3"><text:span text:style-name="T14"><text:s text:c="9"/></text:span></text:p>
          </draw:text-box>
        </draw:frame>
        <draw:frame draw:style-name="gr41" draw:text-style-name="P8" draw:layer="layout" svg:width="1.839cm" svg:height="0.475cm" svg:x="17.728cm" svg:y="17.578cm">
          <draw:text-box>
            <text:p text:style-name="P3"><text:span text:style-name="T15">{{3.1.1id}}</text:span></text:p>
          </draw:text-box>
        </draw:frame>
        <draw:frame draw:style-name="gr42" draw:text-style-name="P11" draw:layer="layout" svg:width="11.604cm" svg:height="0.547cm" svg:x="2.453cm" svg:y="18.691cm">
          <draw:text-box>
            <text:p text:style-name="P3"><text:span text:style-name="T13">2. Does the </text:span><text:span text:style-name="T13">code comply </text:span><text:span text:style-name="T13">with the Coding </text:span><text:span text:style-name="T13">Standards?</text:span></text:p>
          </draw:text-box>
        </draw:frame>
        <draw:frame draw:style-name="gr40" draw:text-style-name="P8" draw:layer="layout" svg:width="0.955cm" svg:height="0.471cm" svg:x="16.855cm" svg:y="18.718cm">
          <draw:text-box>
            <text:p text:style-name="P3"><text:span text:style-name="T14"><text:s text:c="9"/></text:span></text:p>
          </draw:text-box>
        </draw:frame>
        <draw:frame draw:style-name="gr41" draw:text-style-name="P8" draw:layer="layout" svg:width="1.839cm" svg:height="0.475cm" svg:x="17.728cm" svg:y="18.71cm">
          <draw:text-box>
            <text:p text:style-name="P3"><text:span text:style-name="T15">{{3.1.2id}}</text:span></text:p>
          </draw:text-box>
        </draw:frame>
        <draw:frame draw:style-name="gr43" draw:text-style-name="P11" draw:layer="layout" svg:width="14.349cm" svg:height="0.547cm" svg:x="2.385cm" svg:y="19.675cm">
          <draw:text-box>
            <text:p text:style-name="P3"><text:span text:style-name="T13">3. Is the code </text:span><text:span text:style-name="T13">well-structured, </text:span><text:span text:style-name="T13">consistent in </text:span><text:span text:style-name="T13">style, and </text:span><text:span text:style-name="T13">consistently</text:span></text:p>
          </draw:text-box>
        </draw:frame>
        <draw:frame draw:style-name="gr44" draw:text-style-name="P11" draw:layer="layout" svg:width="2.913cm" svg:height="0.547cm" svg:x="2.385cm" svg:y="20.217cm">
          <draw:text-box>
            <text:p text:style-name="P3"><text:span text:style-name="T13"><text:s text:c="4"/>formatted?</text:span></text:p>
          </draw:text-box>
        </draw:frame>
        <draw:frame draw:style-name="gr45" draw:text-style-name="P8" draw:layer="layout" svg:width="1.06cm" svg:height="0.471cm" svg:x="16.855cm" svg:y="19.785cm">
          <draw:text-box>
            <text:p text:style-name="P3"><text:span text:style-name="T14"><text:s text:c="10"/></text:span></text:p>
          </draw:text-box>
        </draw:frame>
        <draw:frame draw:style-name="gr41" draw:text-style-name="P8" draw:layer="layout" svg:width="1.839cm" svg:height="0.475cm" svg:x="17.825cm" svg:y="19.775cm">
          <draw:text-box>
            <text:p text:style-name="P3"><text:span text:style-name="T15">{{3.1.3id}}</text:span></text:p>
          </draw:text-box>
        </draw:frame>
        <draw:frame draw:style-name="gr46" draw:text-style-name="P11" draw:layer="layout" svg:width="10.117cm" svg:height="0.547cm" svg:x="2.444cm" svg:y="20.959cm">
          <draw:text-box>
            <text:p text:style-name="P3"><text:span text:style-name="T13">4. Does the </text:span><text:span text:style-name="T13">implementation </text:span><text:span text:style-name="T13">match the </text:span><text:span text:style-name="T13">design?</text:span></text:p>
          </draw:text-box>
        </draw:frame>
        <draw:frame draw:style-name="gr45" draw:text-style-name="P8" draw:layer="layout" svg:width="1.06cm" svg:height="0.471cm" svg:x="16.855cm" svg:y="20.987cm">
          <draw:text-box>
            <text:p text:style-name="P3"><text:span text:style-name="T14"><text:s text:c="10"/></text:span></text:p>
          </draw:text-box>
        </draw:frame>
        <draw:frame draw:style-name="gr41" draw:text-style-name="P8" draw:layer="layout" svg:width="1.839cm" svg:height="0.475cm" svg:x="17.825cm" svg:y="20.976cm">
          <draw:text-box>
            <text:p text:style-name="P3"><text:span text:style-name="T15">{{3.1.4id}}</text:span></text:p>
          </draw:text-box>
        </draw:frame>
        <draw:frame draw:style-name="gr47" draw:text-style-name="P11" draw:layer="layout" svg:width="8.828cm" svg:height="0.547cm" svg:x="2.458cm" svg:y="22.025cm">
          <draw:text-box>
            <text:p text:style-name="P3"><text:span text:style-name="T13">5. Are all </text:span><text:span text:style-name="T13">functions in the </text:span><text:span text:style-name="T13">design coded?</text:span></text:p>
          </draw:text-box>
        </draw:frame>
        <draw:frame draw:style-name="gr40" draw:text-style-name="P8" draw:layer="layout" svg:width="0.955cm" svg:height="0.471cm" svg:x="16.931cm" svg:y="22.054cm">
          <draw:text-box>
            <text:p text:style-name="P3"><text:span text:style-name="T14"><text:s text:c="9"/></text:span></text:p>
          </draw:text-box>
        </draw:frame>
        <draw:frame draw:style-name="gr41" draw:text-style-name="P8" draw:layer="layout" svg:width="1.839cm" svg:height="0.475cm" svg:x="17.804cm" svg:y="22.043cm">
          <draw:text-box>
            <text:p text:style-name="P3"><text:span text:style-name="T15">{{3.1.5id}}</text:span></text:p>
          </draw:text-box>
        </draw:frame>
        <draw:frame draw:style-name="gr48" draw:text-style-name="P12" draw:layer="layout" svg:width="4.835cm" svg:height="0.585cm" svg:x="2.444cm" svg:y="23.105cm">
          <draw:text-box>
            <text:p text:style-name="P3"><text:span text:style-name="T12">b. </text:span><text:span text:style-name="T12">Documentati</text:span><text:span text:style-name="T12">on</text:span></text:p>
          </draw:text-box>
        </draw:frame>
        <draw:frame draw:style-name="gr49" draw:text-style-name="P11" draw:layer="layout" svg:width="11.01cm" svg:height="0.547cm" svg:x="2.55cm" svg:y="24.133cm">
          <draw:text-box>
            <text:p text:style-name="P3"><text:span text:style-name="T13">1. Is the code </text:span><text:span text:style-name="T13">clearly and </text:span><text:span text:style-name="T13">adequately </text:span><text:span text:style-name="T13">documented?</text:span></text:p>
          </draw:text-box>
        </draw:frame>
        <draw:line draw:style-name="gr34" draw:text-style-name="P2" draw:layer="layout" svg:x1="2.138cm" svg:y1="15.233cm" svg:x2="20.432cm" svg:y2="15.233cm">
          <text:p/>
        </draw:line>
        <draw:line draw:style-name="gr34" draw:text-style-name="P2" draw:layer="layout" svg:x1="2.175cm" svg:y1="16.275cm" svg:x2="20.394cm" svg:y2="16.275cm">
          <text:p/>
        </draw:line>
        <draw:line draw:style-name="gr34" draw:text-style-name="P2" draw:layer="layout" svg:x1="2.175cm" svg:y1="17.322cm" svg:x2="20.394cm" svg:y2="17.322cm">
          <text:p/>
        </draw:line>
        <draw:line draw:style-name="gr34" draw:text-style-name="P2" draw:layer="layout" svg:x1="2.175cm" svg:y1="18.453cm" svg:x2="20.394cm" svg:y2="18.453cm">
          <text:p/>
        </draw:line>
        <draw:line draw:style-name="gr34" draw:text-style-name="P2" draw:layer="layout" svg:x1="2.175cm" svg:y1="19.522cm" svg:x2="20.394cm" svg:y2="19.522cm">
          <text:p/>
        </draw:line>
        <draw:line draw:style-name="gr34" draw:text-style-name="P2" draw:layer="layout" svg:x1="2.181cm" svg:y1="20.821cm" svg:x2="20.4cm" svg:y2="20.821cm">
          <text:p/>
        </draw:line>
        <draw:line draw:style-name="gr34" draw:text-style-name="P2" draw:layer="layout" svg:x1="2.175cm" svg:y1="21.788cm" svg:x2="20.394cm" svg:y2="21.788cm">
          <text:p/>
        </draw:line>
        <draw:line draw:style-name="gr34" draw:text-style-name="P2" draw:layer="layout" svg:x1="2.175cm" svg:y1="22.853cm" svg:x2="20.394cm" svg:y2="22.853cm">
          <text:p/>
        </draw:line>
        <draw:line draw:style-name="gr34" draw:text-style-name="P2" draw:layer="layout" svg:x1="2.175cm" svg:y1="23.894cm" svg:x2="20.394cm" svg:y2="23.894cm">
          <text:p/>
        </draw:line>
        <draw:line draw:style-name="gr34" draw:text-style-name="P2" draw:layer="layout" svg:x1="2.175cm" svg:y1="24.959cm" svg:x2="20.394cm" svg:y2="24.959cm">
          <text:p/>
        </draw:line>
        <draw:line draw:style-name="gr34" draw:text-style-name="P2" draw:layer="layout" svg:x1="2.13cm" svg:y1="26.135cm" svg:x2="20.423cm" svg:y2="26.135cm">
          <text:p/>
        </draw:line>
        <draw:line draw:style-name="gr34" draw:text-style-name="P2" draw:layer="layout" svg:x1="2.159cm" svg:y1="15.212cm" svg:x2="2.153cm" svg:y2="26.132cm">
          <text:p/>
        </draw:line>
        <draw:line draw:style-name="gr34" draw:text-style-name="P2" draw:layer="layout" svg:x1="16.834cm" svg:y1="16.254cm" svg:x2="16.807cm" svg:y2="26.132cm">
          <text:p/>
        </draw:line>
        <draw:line draw:style-name="gr34" draw:text-style-name="P2" draw:layer="layout" svg:x1="20.414cm" svg:y1="15.212cm" svg:x2="20.419cm" svg:y2="26.147cm">
          <text:p/>
        </draw:line>
        <draw:frame draw:style-name="gr45" draw:text-style-name="P8" draw:layer="layout" svg:width="1.06cm" svg:height="0.471cm" svg:x="16.855cm" svg:y="24.158cm">
          <draw:text-box>
            <text:p text:style-name="P3"><text:span text:style-name="T14"><text:s text:c="10"/></text:span></text:p>
          </draw:text-box>
        </draw:frame>
        <draw:frame draw:style-name="gr41" draw:text-style-name="P8" draw:layer="layout" svg:width="1.839cm" svg:height="0.475cm" svg:x="17.825cm" svg:y="24.149cm">
          <draw:text-box>
            <text:p text:style-name="P3"><text:span text:style-name="T15">{{3.1.6id}}</text:span></text:p>
          </draw:text-box>
        </draw:frame>
        <draw:frame draw:style-name="gr50" draw:text-style-name="P11" draw:layer="layout" svg:width="10.072cm" svg:height="0.547cm" svg:x="2.583cm" svg:y="25.196cm">
          <draw:text-box>
            <text:p text:style-name="P3"><text:span text:style-name="T13">2. Are all </text:span><text:span text:style-name="T13">comments </text:span><text:span text:style-name="T13">consistent with </text:span><text:span text:style-name="T13">the code?</text:span></text:p>
          </draw:text-box>
        </draw:frame>
        <draw:frame draw:style-name="gr51" draw:text-style-name="P8" draw:layer="layout" svg:width="0.422cm" svg:height="0.471cm" svg:x="16.855cm" svg:y="25.224cm">
          <draw:text-box>
            <text:p text:style-name="P3"><text:span text:style-name="T14"><text:s/></text:span></text:p>
          </draw:text-box>
        </draw:frame>
        <draw:frame draw:style-name="gr51" draw:text-style-name="P8" draw:layer="layout" svg:width="0.422cm" svg:height="0.471cm" svg:x="20.402cm" svg:y="25.224cm">
          <draw:text-box>
            <text:p text:style-name="P3"><text:span text:style-name="T14"><text:s/></text:span></text:p>
          </draw:text-box>
        </draw:frame>
        <draw:frame draw:style-name="gr52" draw:text-style-name="P8" draw:layer="layout" svg:width="2.78cm" svg:height="0.475cm" svg:x="16.855cm" svg:y="25.122cm">
          <draw:text-box>
            <text:p text:style-name="P3"><text:span text:style-name="T15"><text:s text:c="8"/>{{3.1.7id}}</text:span></text:p>
          </draw:text-box>
        </draw:frame>
        <draw:frame draw:style-name="gr53" draw:text-style-name="P13" draw:layer="layout" svg:width="13.131cm" svg:height="0.657cm" svg:x="5.825cm" svg:y="14.428cm">
          <draw:text-box>
            <text:p text:style-name="P3"><text:span text:style-name="T16">REVIEW –III </text:span><text:span text:style-name="T16">: </text:span><text:span text:style-name="T16">IMPLEMEN</text:span><text:span text:style-name="T16">TATION 25 </text:span><text:span text:style-name="T16">Marks</text:span></text:p>
          </draw:text-box>
        </draw:frame>
        <draw:line draw:style-name="gr34" draw:text-style-name="P2" draw:layer="layout" svg:x1="2.044cm" svg:y1="13.865cm" svg:x2="20.397cm" svg:y2="13.863cm">
          <text:p/>
        </draw:line>
        <draw:frame draw:style-name="gr54" draw:text-style-name="P14" draw:layer="layout" svg:width="3.569cm" svg:height="0.506cm" svg:x="5.624cm" svg:y="6.512cm">
          <draw:text-box>
            <text:p><text:span text:style-name="T6">{{project_title}}</text:span></text:p>
          </draw:text-box>
        </draw:frame>
        <draw:frame draw:style-name="gr54" draw:text-style-name="P14" draw:layer="layout" svg:width="2cm" svg:height="0.506cm" svg:x="16.367cm" svg:y="5.51cm">
          <draw:text-box>
            <text:p><text:span text:style-name="T4"><text:s/></text:span><text:span text:style-name="T4">{{d</text:span><text:span text:style-name="T4">ate</text:span><text:span text:style-name="T4">}}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polygon draw:style-name="gr2" draw:text-style-name="P1" draw:layer="layout" svg:width="21.588cm" svg:height="27.939cm" svg:x="0cm" svg:y="0cm" svg:viewBox="0 0 21589 27940" draw:points="0,0 21589,0 21589,27940 0,27940">
          <text:p><text:s text:c="17"/><text:s text:c="4"/></text:p>
        </draw:polygon>
        <draw:frame draw:style-name="gr3" draw:text-style-name="P2" draw:layer="layout" svg:width="1.506cm" svg:height="1.65cm" svg:x="3.789cm" svg:y="1.136cm">
          <draw:image xlink:href="Pictures/100000010000007E0000008ED5C64468.png" xlink:type="simple" xlink:show="embed" xlink:actuate="onLoad" draw:mime-type="image/png">
            <text:p/>
          </draw:image>
        </draw:frame>
        <draw:frame draw:style-name="gr55" draw:text-style-name="P15" draw:layer="layout" svg:width="2.175cm" svg:height="0.488cm" svg:x="4.826cm" svg:y="3.909cm">
          <draw:text-box>
            <text:p text:style-name="P3"><text:span text:style-name="T17">Class: BE IT</text:span></text:p>
          </draw:text-box>
        </draw:frame>
        <draw:frame draw:style-name="gr4" draw:text-style-name="P4" draw:layer="layout" svg:width="3.856cm" svg:height="0.526cm" svg:x="10.306cm" svg:y="0.828cm">
          <draw:text-box>
            <text:p text:style-name="P3"><text:span text:style-name="T1">Hope </text:span><text:span text:style-name="T1">Foundation's</text:span></text:p>
          </draw:text-box>
        </draw:frame>
        <draw:frame draw:style-name="gr4" draw:text-style-name="P4" draw:layer="layout" svg:width="11.51cm" svg:height="0.526cm" svg:x="5.9cm" svg:y="1.733cm">
          <draw:text-box>
            <text:p text:style-name="P3"><text:span text:style-name="T1">International </text:span><text:span text:style-name="T1">Institute of </text:span><text:span text:style-name="T1">Information </text:span><text:span text:style-name="T1">Technology, Pune</text:span></text:p>
          </draw:text-box>
        </draw:frame>
        <draw:frame draw:style-name="gr56" draw:text-style-name="P16" draw:layer="layout" svg:width="9.94cm" svg:height="0.649cm" svg:x="6.95cm" svg:y="2.355cm">
          <draw:text-box>
            <text:p text:style-name="P3"><text:span text:style-name="T18">Department </text:span><text:span text:style-name="T18">of </text:span><text:span text:style-name="T18">Information </text:span><text:span text:style-name="T18">Technology</text:span></text:p>
          </draw:text-box>
        </draw:frame>
        <draw:polygon draw:style-name="gr57" draw:text-style-name="P17" draw:layer="layout" svg:width="2.334cm" svg:height="0.485cm" svg:x="2.627cm" svg:y="6.167cm" svg:viewBox="0 0 2335 486" draw:points="0,0 2335,0 2335,486 0,486">
          <text:p/>
        </draw:polygon>
        <draw:frame draw:style-name="gr55" draw:text-style-name="P15" draw:layer="layout" svg:width="4.389cm" svg:height="0.488cm" svg:x="9.012cm" svg:y="3.09cm">
          <draw:text-box>
            <text:p text:style-name="P3"><text:span text:style-name="T17">Academic </text:span><text:span text:style-name="T17">Year:2025-26</text:span></text:p>
          </draw:text-box>
        </draw:frame>
        <draw:polygon draw:style-name="gr57" draw:text-style-name="P17" draw:layer="layout" svg:width="0.125cm" svg:height="0.485cm" svg:x="4.963cm" svg:y="6.167cm" svg:viewBox="0 0 126 486" draw:points="0,0 126,0 126,486 0,486">
          <text:p/>
        </draw:polygon>
        <draw:polygon draw:style-name="gr57" draw:text-style-name="P17" draw:layer="layout" svg:width="2.849cm" svg:height="0.485cm" svg:x="5.09cm" svg:y="6.167cm" svg:viewBox="0 0 2850 486" draw:points="0,0 2850,0 2850,486 0,486">
          <text:p/>
        </draw:polygon>
        <draw:polygon draw:style-name="gr57" draw:text-style-name="P17" draw:layer="layout" svg:width="0.13cm" svg:height="0.485cm" svg:x="7.939cm" svg:y="6.167cm" svg:viewBox="0 0 131 486" draw:points="0,0 131,0 131,486 0,486">
          <text:p/>
        </draw:polygon>
        <draw:polygon draw:style-name="gr57" draw:text-style-name="P17" draw:layer="layout" svg:width="0.82cm" svg:height="0.485cm" svg:x="8.066cm" svg:y="6.167cm" svg:viewBox="0 0 821 486" draw:points="0,0 821,0 821,486 0,486">
          <text:p/>
        </draw:polygon>
        <draw:polygon draw:style-name="gr57" draw:text-style-name="P17" draw:layer="layout" svg:width="0.127cm" svg:height="0.485cm" svg:x="8.886cm" svg:y="6.167cm" svg:viewBox="0 0 128 486" draw:points="0,0 128,0 128,486 0,486">
          <text:p/>
        </draw:polygon>
        <draw:polygon draw:style-name="gr57" draw:text-style-name="P17" draw:layer="layout" svg:width="2.93cm" svg:height="0.485cm" svg:x="9.013cm" svg:y="6.167cm" svg:viewBox="0 0 2931 486" draw:points="0,0 2931,0 2931,486 0,486">
          <text:p/>
        </draw:polygon>
        <draw:polygon draw:style-name="gr57" draw:text-style-name="P17" draw:layer="layout" svg:width="0.003cm" svg:height="0.485cm" svg:x="11.798cm" svg:y="6.167cm" svg:viewBox="0 0 4 486" draw:points="0,0 4,0 4,486 0,486">
          <text:p/>
        </draw:polygon>
        <draw:frame draw:style-name="gr55" draw:text-style-name="P15" draw:layer="layout" svg:width="1.231cm" svg:height="0.488cm" svg:x="10.354cm" svg:y="3.909cm">
          <draw:text-box>
            <text:p text:style-name="P3"><text:span text:style-name="T17">SEM-II</text:span></text:p>
          </draw:text-box>
        </draw:frame>
        <draw:frame draw:style-name="gr55" draw:text-style-name="P15" draw:layer="layout" svg:width="3.384cm" svg:height="0.488cm" svg:x="9.373cm" svg:y="4.533cm">
          <draw:text-box>
            <text:p text:style-name="P3"><text:span text:style-name="T17">Project Review III</text:span></text:p>
          </draw:text-box>
        </draw:frame>
        <draw:frame draw:style-name="gr55" draw:text-style-name="P15" draw:layer="layout" svg:width="1.182cm" svg:height="0.488cm" svg:x="14.406cm" svg:y="3.912cm">
          <draw:text-box>
            <text:p text:style-name="P3"><text:span text:style-name="T17">Date: <text:s/></text:span></text:p>
          </draw:text-box>
        </draw:frame>
        <draw:frame draw:style-name="gr58" draw:text-style-name="P15" draw:layer="layout" svg:width="1.734cm" svg:height="0.471cm" svg:x="15.579cm" svg:y="3.916cm">
          <draw:text-box>
            <text:p text:style-name="P3"><text:span text:style-name="T19">{{date}}</text:span></text:p>
          </draw:text-box>
        </draw:frame>
        <draw:frame draw:style-name="gr59" draw:text-style-name="P5" draw:layer="layout" svg:width="11.791cm" svg:height="0.547cm" svg:x="5.525cm" svg:y="5.341cm">
          <draw:text-box>
            <text:p text:style-name="P3"><text:span text:style-name="T20">STUDENT </text:span><text:span text:style-name="T20">PERFORMA</text:span><text:span text:style-name="T20">NCE </text:span><text:span text:style-name="T20">EVALUATI</text:span><text:span text:style-name="T20">ON</text:span></text:p>
          </draw:text-box>
        </draw:frame>
        <draw:frame draw:style-name="gr60" draw:text-style-name="P8" draw:layer="layout" svg:width="9.566cm" svg:height="0.471cm" svg:x="2.873cm" svg:y="6.183cm">
          <draw:text-box>
            <text:p text:style-name="P3"><text:span text:style-name="T19">Student’s </text:span><text:span text:style-name="T19">Contribution </text:span><text:span text:style-name="T19">and </text:span><text:span text:style-name="T19">Performance <text:s/></text:span></text:p>
          </draw:text-box>
        </draw:frame>
        <draw:frame draw:style-name="gr58" draw:text-style-name="P15" draw:layer="layout" svg:width="2.428cm" svg:height="0.471cm" svg:x="6.191cm" svg:y="7.007cm">
          <draw:text-box>
            <text:p text:style-name="P3"><text:span text:style-name="T19">Particulars</text:span></text:p>
          </draw:text-box>
        </draw:frame>
        <draw:frame draw:style-name="gr61" draw:text-style-name="P15" draw:layer="layout" svg:width="2.882cm" svg:height="0.471cm" svg:x="13.875cm" svg:y="6.977cm">
          <draw:text-box>
            <text:p text:style-name="P3"><text:span text:style-name="T21">Marks(25M)</text:span></text:p>
          </draw:text-box>
        </draw:frame>
        <draw:frame draw:style-name="gr58" draw:text-style-name="P15" draw:layer="layout" svg:width="3.628cm" svg:height="0.471cm" svg:x="13.312cm" svg:y="7.631cm">
          <draw:text-box>
            <text:p text:style-name="P3"><text:span text:style-name="T19">Group Members</text:span></text:p>
          </draw:text-box>
        </draw:frame>
        <draw:frame draw:style-name="gr58" draw:text-style-name="P15" draw:layer="layout" svg:width="0.506cm" svg:height="0.471cm" svg:x="13.13cm" svg:y="8.289cm">
          <draw:text-box>
            <text:p text:style-name="P3"><text:span text:style-name="T22">1</text:span></text:p>
          </draw:text-box>
        </draw:frame>
        <draw:frame draw:style-name="gr58" draw:text-style-name="P15" draw:layer="layout" svg:width="0.506cm" svg:height="0.471cm" svg:x="15.081cm" svg:y="8.289cm">
          <draw:text-box>
            <text:p text:style-name="P3"><text:span text:style-name="T22">2</text:span></text:p>
          </draw:text-box>
        </draw:frame>
        <draw:frame draw:style-name="gr58" draw:text-style-name="P15" draw:layer="layout" svg:width="0.506cm" svg:height="0.471cm" svg:x="16.917cm" svg:y="8.289cm">
          <draw:text-box>
            <text:p text:style-name="P3"><text:span text:style-name="T22">3</text:span></text:p>
          </draw:text-box>
        </draw:frame>
        <draw:frame draw:style-name="gr58" draw:text-style-name="P15" draw:layer="layout" svg:width="0.506cm" svg:height="0.471cm" svg:x="18.672cm" svg:y="8.289cm">
          <draw:text-box>
            <text:p text:style-name="P3"><text:span text:style-name="T22">4</text:span></text:p>
          </draw:text-box>
        </draw:frame>
        <draw:frame draw:style-name="gr62" draw:text-style-name="P8" draw:layer="layout" svg:width="9.429cm" svg:height="0.471cm" svg:x="2.69cm" svg:y="8.946cm">
          <draw:text-box>
            <text:p text:style-name="P3"><text:span text:style-name="T14"><text:s/>1. Detailed study of </text:span><text:span text:style-name="T14">Algorithm(s) / </text:span><text:span text:style-name="T14">Model / Hardware </text:span></text:p>
          </draw:text-box>
        </draw:frame>
        <draw:frame draw:style-name="gr55" draw:text-style-name="P15" draw:layer="layout" svg:width="5.292cm" svg:height="0.471cm" svg:x="2.923cm" svg:y="9.432cm">
          <draw:text-box>
            <text:p text:style-name="P3"><text:span text:style-name="T14"><text:s text:c="3"/>specification (As </text:span><text:span text:style-name="T14">applicable).</text:span></text:p>
          </draw:text-box>
        </draw:frame>
        <draw:frame draw:style-name="gr55" draw:text-style-name="P15" draw:layer="layout" svg:width="1.661cm" svg:height="0.471cm" svg:x="12.25cm" svg:y="8.967cm">
          <draw:text-box>
            <text:p text:style-name="P3"><text:span text:style-name="T14">{{3.1.1}}</text:span></text:p>
          </draw:text-box>
        </draw:frame>
        <draw:frame draw:style-name="gr55" draw:text-style-name="P15" draw:layer="layout" svg:width="1.767cm" svg:height="0.471cm" svg:x="14.354cm" svg:y="8.967cm">
          <draw:text-box>
            <text:p text:style-name="P3"><text:span text:style-name="T14">{{3.1.2}} </text:span></text:p>
          </draw:text-box>
        </draw:frame>
        <draw:frame draw:style-name="gr63" draw:text-style-name="P8" draw:layer="layout" svg:width="9.494cm" svg:height="0.471cm" svg:x="2.672cm" svg:y="10.113cm">
          <draw:text-box>
            <text:p text:style-name="P3"><text:span text:style-name="T23"><text:s/>2.Confirmation of </text:span><text:span text:style-name="T23">Data set used (As </text:span><text:span text:style-name="T23">applicable)</text:span></text:p>
          </draw:text-box>
        </draw:frame>
        <draw:frame draw:style-name="gr55" draw:text-style-name="P15" draw:layer="layout" svg:width="1.661cm" svg:height="0.471cm" svg:x="12.25cm" svg:y="10.108cm">
          <draw:text-box>
            <text:p text:style-name="P3"><text:span text:style-name="T14">{{3.2.1}}</text:span></text:p>
          </draw:text-box>
        </draw:frame>
        <draw:frame draw:style-name="gr55" draw:text-style-name="P15" draw:layer="layout" svg:width="1.661cm" svg:height="0.471cm" svg:x="14.314cm" svg:y="10.108cm">
          <draw:text-box>
            <text:p text:style-name="P3"><text:span text:style-name="T14">{{3.2.2}}</text:span></text:p>
          </draw:text-box>
        </draw:frame>
        <draw:frame draw:style-name="gr55" draw:text-style-name="P15" draw:layer="layout" svg:width="3.427cm" svg:height="0.471cm" svg:x="16.189cm" svg:y="10.113cm">
          <draw:text-box>
            <text:p text:style-name="P3"><text:span text:style-name="T14">{{3.2.3}} {{3.2.4}}</text:span></text:p>
          </draw:text-box>
        </draw:frame>
        <draw:frame draw:style-name="gr64" draw:text-style-name="P8" draw:layer="layout" svg:width="4.683cm" svg:height="0.471cm" svg:x="2.825cm" svg:y="10.932cm">
          <draw:text-box>
            <text:p text:style-name="P3"><text:span text:style-name="T23">3.50 % </text:span><text:span text:style-name="T23">Implementation</text:span></text:p>
          </draw:text-box>
        </draw:frame>
        <draw:frame draw:style-name="gr55" draw:text-style-name="P15" draw:layer="layout" svg:width="3.177cm" svg:height="0.471cm" svg:x="7.458cm" svg:y="10.932cm">
          <draw:text-box>
            <text:p text:style-name="P3"><text:span text:style-name="T14"><text:s text:c="30"/></text:span></text:p>
          </draw:text-box>
        </draw:frame>
        <draw:frame draw:style-name="gr65" draw:text-style-name="P15" draw:layer="layout" svg:width="1.368cm" svg:height="0.471cm" svg:x="10.633cm" svg:y="10.932cm">
          <draw:text-box>
            <text:p text:style-name="P3"><text:span text:style-name="T23">(10 M)</text:span></text:p>
          </draw:text-box>
        </draw:frame>
        <draw:frame draw:style-name="gr55" draw:text-style-name="P15" draw:layer="layout" svg:width="1.661cm" svg:height="0.471cm" svg:x="12.403cm" svg:y="10.778cm">
          <draw:text-box>
            <text:p text:style-name="P3"><text:span text:style-name="T14">{{3.3.1}}</text:span></text:p>
          </draw:text-box>
        </draw:frame>
        <draw:frame draw:style-name="gr55" draw:text-style-name="P15" draw:layer="layout" svg:width="5.192cm" svg:height="0.471cm" svg:x="14.354cm" svg:y="10.778cm">
          <draw:text-box>
            <text:p text:style-name="P3"><text:span text:style-name="T14">{{3.3.2}} {{3.3.3}} </text:span><text:span text:style-name="T14">{{3.3.4}}</text:span></text:p>
          </draw:text-box>
        </draw:frame>
        <draw:frame draw:style-name="gr66" draw:text-style-name="P8" draw:layer="layout" svg:width="4.863cm" svg:height="0.471cm" svg:x="2.791cm" svg:y="11.752cm">
          <draw:text-box>
            <text:p text:style-name="P3"><text:span text:style-name="T10">4. Partial results </text:span><text:span text:style-name="T10">obtained</text:span></text:p>
          </draw:text-box>
        </draw:frame>
        <draw:frame draw:style-name="gr55" draw:text-style-name="P15" draw:layer="layout" svg:width="3.283cm" svg:height="0.471cm" svg:x="7.627cm" svg:y="11.752cm">
          <draw:text-box>
            <text:p text:style-name="P3"><text:span text:style-name="T14"><text:s text:c="31"/></text:span></text:p>
          </draw:text-box>
        </draw:frame>
        <draw:frame draw:style-name="gr67" draw:text-style-name="P15" draw:layer="layout" svg:width="1.075cm" svg:height="0.471cm" svg:x="10.908cm" svg:y="11.752cm">
          <draw:text-box>
            <text:p text:style-name="P3"><text:span text:style-name="T10">(7 M)</text:span></text:p>
          </draw:text-box>
        </draw:frame>
        <draw:frame draw:style-name="gr55" draw:text-style-name="P15" draw:layer="layout" svg:width="1.661cm" svg:height="0.471cm" svg:x="12.403cm" svg:y="11.598cm">
          <draw:text-box>
            <text:p text:style-name="P3"><text:span text:style-name="T14">{{3.4.1}}</text:span></text:p>
          </draw:text-box>
        </draw:frame>
        <draw:frame draw:style-name="gr55" draw:text-style-name="P15" draw:layer="layout" svg:width="5.192cm" svg:height="0.471cm" svg:x="14.354cm" svg:y="11.598cm">
          <draw:text-box>
            <text:p text:style-name="P3"><text:span text:style-name="T14">{{3.4.2}} {{3.4.3}} </text:span><text:span text:style-name="T14">{{3.4.4}}</text:span></text:p>
          </draw:text-box>
        </draw:frame>
        <draw:frame draw:style-name="gr68" draw:text-style-name="P8" draw:layer="layout" svg:width="3.967cm" svg:height="0.471cm" svg:x="2.825cm" svg:y="12.577cm">
          <draw:text-box>
            <text:p text:style-name="P3"><text:span text:style-name="T10">5. Presentation </text:span><text:span text:style-name="T10">skills</text:span></text:p>
          </draw:text-box>
        </draw:frame>
        <draw:frame draw:style-name="gr55" draw:text-style-name="P15" draw:layer="layout" svg:width="4.13cm" svg:height="0.471cm" svg:x="6.782cm" svg:y="12.577cm">
          <draw:text-box>
            <text:p text:style-name="P3"><text:span text:style-name="T14"><text:s text:c="34"/></text:span><text:span text:style-name="T14"><text:s text:c="5"/></text:span></text:p>
          </draw:text-box>
        </draw:frame>
        <draw:frame draw:style-name="gr67" draw:text-style-name="P15" draw:layer="layout" svg:width="1.075cm" svg:height="0.471cm" svg:x="10.909cm" svg:y="12.577cm">
          <draw:text-box>
            <text:p text:style-name="P3"><text:span text:style-name="T10">(4 M)</text:span></text:p>
          </draw:text-box>
        </draw:frame>
        <draw:frame draw:style-name="gr55" draw:text-style-name="P15" draw:layer="layout" svg:width="1.661cm" svg:height="0.471cm" svg:x="12.403cm" svg:y="12.419cm">
          <draw:text-box>
            <text:p text:style-name="P3"><text:span text:style-name="T14">{{3.5.1}}</text:span></text:p>
          </draw:text-box>
        </draw:frame>
        <draw:frame draw:style-name="gr55" draw:text-style-name="P15" draw:layer="layout" svg:width="5.192cm" svg:height="0.471cm" svg:x="14.354cm" svg:y="12.419cm">
          <draw:text-box>
            <text:p text:style-name="P3"><text:span text:style-name="T14">{{3.5.2}} {{3.5.3}} </text:span><text:span text:style-name="T14">{{3.5.4}}</text:span></text:p>
          </draw:text-box>
        </draw:frame>
        <draw:frame draw:style-name="gr69" draw:text-style-name="P8" draw:layer="layout" svg:width="4.813cm" svg:height="0.471cm" svg:x="2.825cm" svg:y="13.396cm">
          <draw:text-box>
            <text:p text:style-name="P3"><text:span text:style-name="T23">6. Question and </text:span><text:span text:style-name="T23">Answer</text:span></text:p>
          </draw:text-box>
        </draw:frame>
        <draw:frame draw:style-name="gr55" draw:text-style-name="P15" draw:layer="layout" svg:width="3.283cm" svg:height="0.471cm" svg:x="7.616cm" svg:y="13.396cm">
          <draw:text-box>
            <text:p text:style-name="P3"><text:span text:style-name="T14"><text:s text:c="31"/></text:span></text:p>
          </draw:text-box>
        </draw:frame>
        <draw:frame draw:style-name="gr65" draw:text-style-name="P15" draw:layer="layout" svg:width="1.124cm" svg:height="0.471cm" svg:x="10.897cm" svg:y="13.396cm">
          <draw:text-box>
            <text:p text:style-name="P3"><text:span text:style-name="T23">(4 M)</text:span></text:p>
          </draw:text-box>
        </draw:frame>
        <draw:polygon draw:style-name="gr70" draw:text-style-name="P18" draw:layer="layout" svg:width="2.451cm" svg:height="0.485cm" svg:x="9.46cm" svg:y="15.371cm" svg:viewBox="0 0 2452 486" draw:points="0,0 2452,0 2452,486 0,486">
          <text:p/>
        </draw:polygon>
        <draw:frame draw:style-name="gr55" draw:text-style-name="P15" draw:layer="layout" svg:width="1.661cm" svg:height="0.471cm" svg:x="12.403cm" svg:y="13.242cm">
          <draw:text-box>
            <text:p text:style-name="P3"><text:span text:style-name="T14">{{3.6.1}}</text:span></text:p>
          </draw:text-box>
        </draw:frame>
        <draw:polygon draw:style-name="gr70" draw:text-style-name="P18" draw:layer="layout" svg:width="0.001cm" svg:height="0.485cm" svg:x="11.913cm" svg:y="15.371cm" svg:viewBox="0 0 2 486" draw:points="0,0 2,0 2,486 0,486">
          <text:p/>
        </draw:polygon>
        <draw:frame draw:style-name="gr55" draw:text-style-name="P15" draw:layer="layout" svg:width="5.192cm" svg:height="0.471cm" svg:x="14.354cm" svg:y="13.242cm">
          <draw:text-box>
            <text:p text:style-name="P3"><text:span text:style-name="T14">{{3.6.2}} {{3.6.3}} </text:span><text:span text:style-name="T14">{{3.6.4}}</text:span></text:p>
          </draw:text-box>
        </draw:frame>
        <draw:frame draw:style-name="gr71" draw:text-style-name="P8" draw:layer="layout" svg:width="8.844cm" svg:height="0.471cm" svg:x="2.756cm" svg:y="14.216cm">
          <draw:text-box>
            <text:p text:style-name="P3"><text:span text:style-name="T24"><text:s/>7. <text:s/>Summarize <text:s/>the </text:span><text:span text:style-name="T24"><text:s/>methodologies <text:s/></text:span><text:span text:style-name="T24">/Algorithms </text:span></text:p>
          </draw:text-box>
        </draw:frame>
        <draw:frame draw:style-name="gr72" draw:text-style-name="P15" draw:layer="layout" svg:width="6.421cm" svg:height="0.471cm" svg:x="2.931cm" svg:y="14.703cm">
          <draw:text-box>
            <text:p text:style-name="P3"><text:span text:style-name="T24"><text:s text:c="4"/>implemented / to </text:span><text:span text:style-name="T24">be implemented</text:span></text:p>
          </draw:text-box>
        </draw:frame>
        <draw:line draw:style-name="gr34" draw:text-style-name="P2" draw:layer="layout" svg:x1="2.461cm" svg:y1="5.985cm" svg:x2="19.66cm" svg:y2="5.985cm">
          <text:p/>
        </draw:line>
        <draw:line draw:style-name="gr34" draw:text-style-name="P2" draw:layer="layout" svg:x1="2.495cm" svg:y1="6.805cm" svg:x2="19.623cm" svg:y2="6.805cm">
          <text:p/>
        </draw:line>
        <draw:line draw:style-name="gr34" draw:text-style-name="P2" draw:layer="layout" svg:x1="12.211cm" svg:y1="7.465cm" svg:x2="19.623cm" svg:y2="7.465cm">
          <text:p/>
        </draw:line>
        <draw:line draw:style-name="gr34" draw:text-style-name="P2" draw:layer="layout" svg:x1="12.211cm" svg:y1="8.115cm" svg:x2="19.623cm" svg:y2="8.115cm">
          <text:p/>
        </draw:line>
        <draw:line draw:style-name="gr34" draw:text-style-name="P2" draw:layer="layout" svg:x1="2.495cm" svg:y1="8.776cm" svg:x2="19.623cm" svg:y2="8.776cm">
          <text:p/>
        </draw:line>
        <draw:line draw:style-name="gr34" draw:text-style-name="P2" draw:layer="layout" svg:x1="2.495cm" svg:y1="9.919cm" svg:x2="19.623cm" svg:y2="9.919cm">
          <text:p/>
        </draw:line>
        <draw:line draw:style-name="gr34" draw:text-style-name="P2" draw:layer="layout" svg:x1="2.495cm" svg:y1="10.742cm" svg:x2="19.623cm" svg:y2="10.742cm">
          <text:p/>
        </draw:line>
        <draw:line draw:style-name="gr34" draw:text-style-name="P2" draw:layer="layout" svg:x1="2.495cm" svg:y1="11.564cm" svg:x2="19.623cm" svg:y2="11.564cm">
          <text:p/>
        </draw:line>
        <draw:line draw:style-name="gr34" draw:text-style-name="P2" draw:layer="layout" svg:x1="2.495cm" svg:y1="12.381cm" svg:x2="19.623cm" svg:y2="12.381cm">
          <text:p/>
        </draw:line>
        <draw:line draw:style-name="gr34" draw:text-style-name="P2" draw:layer="layout" svg:x1="2.495cm" svg:y1="13.207cm" svg:x2="19.623cm" svg:y2="13.207cm">
          <text:p/>
        </draw:line>
        <draw:line draw:style-name="gr34" draw:text-style-name="P2" draw:layer="layout" svg:x1="2.495cm" svg:y1="14.027cm" svg:x2="19.623cm" svg:y2="14.027cm">
          <text:p/>
        </draw:line>
        <draw:line draw:style-name="gr34" draw:text-style-name="P2" draw:layer="layout" svg:x1="2.495cm" svg:y1="15.19cm" svg:x2="19.623cm" svg:y2="15.19cm">
          <text:p/>
        </draw:line>
        <draw:line draw:style-name="gr34" draw:text-style-name="P2" draw:layer="layout" svg:x1="2.495cm" svg:y1="16.009cm" svg:x2="19.623cm" svg:y2="16.009cm">
          <text:p/>
        </draw:line>
        <draw:line draw:style-name="gr34" draw:text-style-name="P2" draw:layer="layout" svg:x1="2.463cm" svg:y1="17.173cm" svg:x2="19.662cm" svg:y2="17.173cm">
          <text:p/>
        </draw:line>
        <draw:line draw:style-name="gr34" draw:text-style-name="P2" draw:layer="layout" svg:x1="2.478cm" svg:y1="5.968cm" svg:x2="2.479cm" svg:y2="17.182cm">
          <text:p/>
        </draw:line>
        <draw:line draw:style-name="gr34" draw:text-style-name="P2" draw:layer="layout" svg:x1="12.228cm" svg:y1="6.788cm" svg:x2="12.228cm" svg:y2="16.028cm">
          <text:p/>
        </draw:line>
        <draw:line draw:style-name="gr34" draw:text-style-name="P2" draw:layer="layout" svg:x1="14.226cm" svg:y1="8.1cm" svg:x2="14.226cm" svg:y2="16.027cm">
          <text:p/>
        </draw:line>
        <draw:line draw:style-name="gr34" draw:text-style-name="P2" draw:layer="layout" svg:x1="16.131cm" svg:y1="8.1cm" svg:x2="16.131cm" svg:y2="16.027cm">
          <text:p/>
        </draw:line>
        <draw:line draw:style-name="gr34" draw:text-style-name="P2" draw:layer="layout" svg:x1="17.894cm" svg:y1="8.1cm" svg:x2="17.894cm" svg:y2="16.027cm">
          <text:p/>
        </draw:line>
        <draw:line draw:style-name="gr34" draw:text-style-name="P2" draw:layer="layout" svg:x1="19.64cm" svg:y1="5.968cm" svg:x2="19.639cm" svg:y2="17.184cm">
          <text:p/>
        </draw:line>
        <draw:frame draw:style-name="gr55" draw:text-style-name="P15" draw:layer="layout" svg:width="1.661cm" svg:height="0.471cm" svg:x="12.402cm" svg:y="14.216cm">
          <draw:text-box>
            <text:p text:style-name="P3"><text:span text:style-name="T14">{{3.7.1}}</text:span></text:p>
          </draw:text-box>
        </draw:frame>
        <draw:frame draw:style-name="gr55" draw:text-style-name="P15" draw:layer="layout" svg:width="5.192cm" svg:height="0.471cm" svg:x="14.39cm" svg:y="14.216cm">
          <draw:text-box>
            <text:p text:style-name="P3"><text:span text:style-name="T14">{{3.7.2}} {{3.7.3}} </text:span><text:span text:style-name="T14">{{3.7.4}}</text:span></text:p>
          </draw:text-box>
        </draw:frame>
        <draw:frame draw:style-name="gr58" draw:text-style-name="P15" draw:layer="layout" svg:width="2.485cm" svg:height="0.471cm" svg:x="9.465cm" svg:y="15.387cm">
          <draw:text-box>
            <text:p text:style-name="P3"><text:span text:style-name="T19">Total(25M)</text:span></text:p>
          </draw:text-box>
        </draw:frame>
        <draw:frame draw:style-name="gr55" draw:text-style-name="P15" draw:layer="layout" svg:width="1.661cm" svg:height="0.471cm" svg:x="12.403cm" svg:y="15.225cm">
          <draw:text-box>
            <text:p text:style-name="P3"><text:span text:style-name="T14">{{3.8.1}}</text:span></text:p>
          </draw:text-box>
        </draw:frame>
        <draw:frame draw:style-name="gr55" draw:text-style-name="P15" draw:layer="layout" svg:width="5.192cm" svg:height="0.471cm" svg:x="14.354cm" svg:y="15.225cm">
          <draw:text-box>
            <text:p text:style-name="P3"><text:span text:style-name="T14">{{3.8.2}} {{3.8.3}} </text:span><text:span text:style-name="T14">{{3.8.4}}</text:span></text:p>
          </draw:text-box>
        </draw:frame>
        <draw:frame draw:style-name="gr73" draw:text-style-name="P8" draw:layer="layout" svg:width="5.868cm" svg:height="0.599cm" svg:x="2.737cm" svg:y="16.083cm">
          <draw:text-box>
            <text:p text:style-name="P3"><text:span text:style-name="T19">Comments (if </text:span><text:span text:style-name="T19">any) : {{3.c}}</text:span></text:p>
          </draw:text-box>
        </draw:frame>
        <draw:frame draw:style-name="gr67" draw:text-style-name="P15" draw:layer="layout" svg:width="9.571cm" svg:height="0.471cm" svg:x="2.241cm" svg:y="17.458cm">
          <draw:text-box>
            <text:p text:style-name="P3"><text:span text:style-name="T10"># To be filled by </text:span><text:span text:style-name="T10">internal guide &amp; </text:span><text:span text:style-name="T10">reviewer(s) only.</text:span></text:p>
          </draw:text-box>
        </draw:frame>
        <draw:frame draw:style-name="gr74" draw:text-style-name="P19" draw:layer="layout" svg:width="0.387cm" svg:height="0.45cm" svg:x="2.08cm" svg:y="17.977cm">
          <draw:text-box>
            <text:p text:style-name="P3"><text:span text:style-name="T25">*</text:span></text:p>
          </draw:text-box>
        </draw:frame>
        <draw:frame draw:style-name="gr72" draw:text-style-name="P15" draw:layer="layout" svg:width="12.95cm" svg:height="0.471cm" svg:x="2.241cm" svg:y="17.965cm">
          <draw:text-box>
            <text:p text:style-name="P3"><text:span text:style-name="T24">Whether the </text:span><text:span text:style-name="T24">presentation / </text:span><text:span text:style-name="T24">evaluation is as per </text:span><text:span text:style-name="T24">the schedule. : YES </text:span><text:span text:style-name="T24">/ NO </text:span></text:p>
          </draw:text-box>
        </draw:frame>
        <draw:frame draw:style-name="gr74" draw:text-style-name="P19" draw:layer="layout" svg:width="0.387cm" svg:height="0.45cm" svg:x="2.08cm" svg:y="18.459cm">
          <draw:text-box>
            <text:p text:style-name="P3"><text:span text:style-name="T25">*</text:span></text:p>
          </draw:text-box>
        </draw:frame>
        <draw:frame draw:style-name="gr75" draw:text-style-name="P19" draw:layer="layout" svg:width="4.954cm" svg:height="0.433cm" svg:x="2.241cm" svg:y="18.483cm">
          <draw:text-box>
            <text:p text:style-name="P3"><text:span text:style-name="T26">Review – III: </text:span><text:span text:style-name="T26">Deliverables</text:span></text:p>
          </draw:text-box>
        </draw:frame>
        <draw:frame draw:style-name="gr55" draw:text-style-name="P15" draw:layer="layout" svg:width="0.422cm" svg:height="0.492cm" svg:x="2.274cm" svg:y="19.009cm">
          <draw:text-box>
            <text:p text:style-name="P3"><text:span text:style-name="T27">•</text:span></text:p>
          </draw:text-box>
        </draw:frame>
        <draw:frame draw:style-name="gr67" draw:text-style-name="P15" draw:layer="layout" svg:width="6.364cm" svg:height="0.471cm" svg:x="2.662cm" svg:y="19.025cm">
          <draw:text-box>
            <text:p text:style-name="P3"><text:span text:style-name="T10">Detailed Design </text:span><text:span text:style-name="T10">(if any deviation)</text:span></text:p>
          </draw:text-box>
        </draw:frame>
        <draw:frame draw:style-name="gr55" draw:text-style-name="P15" draw:layer="layout" svg:width="0.422cm" svg:height="0.492cm" svg:x="2.274cm" svg:y="19.523cm">
          <draw:text-box>
            <text:p text:style-name="P3"><text:span text:style-name="T27">•</text:span></text:p>
          </draw:text-box>
        </draw:frame>
        <draw:frame draw:style-name="gr65" draw:text-style-name="P15" draw:layer="layout" svg:width="5.64cm" svg:height="0.471cm" svg:x="2.662cm" svg:y="19.538cm">
          <draw:text-box>
            <text:p text:style-name="P3"><text:span text:style-name="T23">50% of code </text:span><text:span text:style-name="T23">implementation</text:span></text:p>
          </draw:text-box>
        </draw:frame>
        <draw:frame draw:style-name="gr55" draw:text-style-name="P15" draw:layer="layout" svg:width="0.422cm" svg:height="0.492cm" svg:x="2.274cm" svg:y="20.045cm">
          <draw:text-box>
            <text:p text:style-name="P3"><text:span text:style-name="T27">•</text:span></text:p>
          </draw:text-box>
        </draw:frame>
        <draw:frame draw:style-name="gr65" draw:text-style-name="P15" draw:layer="layout" svg:width="5.41cm" svg:height="0.471cm" svg:x="2.662cm" svg:y="20.06cm">
          <draw:text-box>
            <text:p text:style-name="P3"><text:span text:style-name="T23">Some </text:span><text:span text:style-name="T23">Experimental </text:span><text:span text:style-name="T23">Results</text:span></text:p>
          </draw:text-box>
        </draw:frame>
        <draw:frame draw:style-name="gr55" draw:text-style-name="P15" draw:layer="layout" svg:width="0.422cm" svg:height="0.492cm" svg:x="2.274cm" svg:y="20.553cm">
          <draw:text-box>
            <text:p text:style-name="P3"><text:span text:style-name="T27">•</text:span></text:p>
          </draw:text-box>
        </draw:frame>
        <draw:frame draw:style-name="gr72" draw:text-style-name="P15" draw:layer="layout" svg:width="2.829cm" svg:height="0.471cm" svg:x="2.662cm" svg:y="20.568cm">
          <draw:text-box>
            <text:p text:style-name="P3"><text:span text:style-name="T24">Project Plan 3.0</text:span></text:p>
          </draw:text-box>
        </draw:frame>
        <draw:frame draw:style-name="gr67" draw:text-style-name="P15" draw:layer="layout" svg:width="8.485cm" svg:height="0.471cm" svg:x="2.08cm" svg:y="21.559cm">
          <draw:text-box>
            <text:p text:style-name="P3"><text:span text:style-name="T10">Name &amp; Signature </text:span><text:span text:style-name="T10">of evaluation </text:span><text:span text:style-name="T10">committee –</text:span></text:p>
          </draw:text-box>
        </draw:frame>
        <draw:frame draw:style-name="gr67" draw:text-style-name="P15" draw:layer="layout" svg:width="3.868cm" svg:height="0.471cm" svg:x="1.923cm" svg:y="23.038cm">
          <draw:text-box>
            <text:p text:style-name="P3"><text:span text:style-name="T10">Name of Reviewer </text:span><text:span text:style-name="T10">1</text:span></text:p>
          </draw:text-box>
        </draw:frame>
        <draw:frame draw:style-name="gr67" draw:text-style-name="P15" draw:layer="layout" svg:width="3.868cm" svg:height="0.471cm" svg:x="8.033cm" svg:y="23.038cm">
          <draw:text-box>
            <text:p text:style-name="P3"><text:span text:style-name="T10">Name of Reviewer </text:span><text:span text:style-name="T10">2</text:span></text:p>
          </draw:text-box>
        </draw:frame>
        <draw:frame draw:style-name="gr67" draw:text-style-name="P15" draw:layer="layout" svg:width="4.437cm" svg:height="0.471cm" svg:x="15.166cm" svg:y="23.038cm">
          <draw:text-box>
            <text:p text:style-name="P3"><text:span text:style-name="T10">Name of Internal </text:span><text:span text:style-name="T10">Guide</text:span></text:p>
          </draw:text-box>
        </draw:frame>
        <draw:frame draw:style-name="gr67" draw:text-style-name="P15" draw:layer="layout" svg:width="3.172cm" svg:height="0.471cm" svg:x="14.937cm" svg:y="23.771cm">
          <draw:text-box>
            <text:p text:style-name="P3"><text:span text:style-name="T10">{{guide_name}}</text:span></text:p>
          </draw:text-box>
        </draw:frame>
        <draw:frame draw:style-name="gr67" draw:text-style-name="P15" draw:layer="layout" svg:width="2.642cm" svg:height="0.471cm" svg:x="1.817cm" svg:y="23.77cm">
          <draw:text-box>
            <text:p text:style-name="P3"><text:span text:style-name="T10">{{r2_name}} </text:span></text:p>
          </draw:text-box>
        </draw:frame>
        <draw:frame draw:style-name="gr67" draw:text-style-name="P15" draw:layer="layout" svg:width="2.758cm" svg:height="0.471cm" svg:x="7.952cm" svg:y="23.77cm">
          <draw:text-box>
            <text:p text:style-name="P3"><text:span text:style-name="T10">{{r1_name}} <text:s/></text:span></text:p>
          </draw:text-box>
        </draw:frame>
        <draw:frame draw:style-name="gr55" draw:text-style-name="P15" draw:layer="layout" svg:width="3.427cm" svg:height="0.471cm" svg:x="16.177cm" svg:y="8.955cm">
          <draw:text-box>
            <text:p text:style-name="P3"><text:span text:style-name="T14">{{3.1.3}} {{3.1.4}}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adea" svg:font-family="Calade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9-16T16:13:12.014830833</meta:print-date>
    <meta:printed-by>PDF files</meta:printed-by>
    <dc:date>2025-09-16T16:14:38.529552078</dc:date>
    <meta:editing-duration>PT1M26S</meta:editing-duration>
    <meta:editing-cycles>1</meta:editing-cycles>
    <meta:document-statistic meta:object-count="247"/>
    <meta:generator>LibreOffice/25.2.5.2$Linux_X86_64 LibreOffice_project/520$Build-2</meta:generator>
  </office:meta>
</office:document-meta>
</file>