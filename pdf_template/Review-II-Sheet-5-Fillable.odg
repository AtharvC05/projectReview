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700000088DC5928DA.jpg" manifest:media-type="image/jpeg"/>
  <manifest:file-entry manifest:full-path="Pictures/100000000000003E00000009CE56A4D2.png" manifest:media-type="image/png"/>
  <manifest:file-entry manifest:full-path="Pictures/100000000000003E00000009CFBFE20C.png" manifest:media-type="image/png"/>
  <manifest:file-entry manifest:full-path="Pictures/100000000000044300000009C3645821.png" manifest:media-type="image/png"/>
  <manifest:file-entry manifest:full-path="Pictures/100000000000003E0000000986BCDF38.png" manifest:media-type="image/png"/>
  <manifest:file-entry manifest:full-path="Pictures/10000000000003EF000000091C0A26A6.png" manifest:media-type="image/png"/>
  <manifest:file-entry manifest:full-path="Pictures/100000000000003E00000009002CA445.png" manifest:media-type="image/png"/>
  <manifest:file-entry manifest:full-path="Pictures/10000000000000400000005266EC1E1E.jpg" manifest:media-type="image/jpeg"/>
  <manifest:file-entry manifest:full-path="Pictures/10000000000008890000000A8DEC25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23cm" svg:stroke-color="#000000" draw:stroke-linejoin="miter" svg:stroke-linecap="butt" draw:fill="none" fo:padding-top="0.011cm" fo:padding-bottom="0.011cm" fo:padding-left="0.011cm" fo:padding-right="0.011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0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42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44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095cm" fo:min-width="1.8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19cm" fo:min-width="2.70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19cm" fo:min-width="2.64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12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42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1.8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70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64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3.7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33cm" fo:min-width="3.54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4.10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e7e6e6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34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2.98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5.32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d9dada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1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solid" draw:fill-color="#f1f1f1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09cm" fo:min-width="0.30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44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0.37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23cm" svg:stroke-color="#ffffff" draw:stroke-linejoin="miter" svg:stroke-linecap="butt" draw:fill="none" fo:padding-top="0.011cm" fo:padding-bottom="0.011cm" fo:padding-left="0.011cm" fo:padding-right="0.011cm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6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5pt" style:font-size-asian="10.5pt" style:font-size-complex="10.5pt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1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start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>
      <loext:graphic-properties draw:fill="none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15" style:family="paragraph">
      <loext:graphic-properties draw:fill="none"/>
      <style:text-properties fo:font-size="10.5pt" fo:font-weight="normal" style:font-size-asian="10.5pt" style:font-weight-asian="normal" style:font-size-complex="10.5pt" style:font-weight-complex="normal"/>
    </style:style>
    <style:style style:name="P16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7" style:family="paragraph">
      <loext:graphic-properties draw:fill="solid" draw:fill-color="#e7e6e6"/>
    </style:style>
    <style:style style:name="P1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text-align="start" fo:text-indent="0cm" style:writing-mode="lr-tb"/>
      <style:text-properties fo:font-weight="normal" style:font-weight-asian="normal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text-align="start" fo:text-indent="0cm"/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>
      <loext:graphic-properties draw:fill="solid" draw:fill-color="#d9dada"/>
    </style:style>
    <style:style style:name="P22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23" style:family="paragraph">
      <loext:graphic-properties draw:fill="none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start"/>
      <style:text-properties fo:font-size="11.6999998092651pt" style:font-size-asian="11.6999998092651pt" style:font-size-complex="11.6999998092651pt"/>
    </style:style>
    <style:style style:name="P25" style:family="paragraph">
      <loext:graphic-properties draw:fill="none"/>
      <style:text-properties fo:font-size="9pt" style:font-size-asian="9pt" style:font-size-complex="9pt"/>
    </style:style>
    <style:style style:name="P26" style:family="paragraph">
      <loext:graphic-properties draw:fill="solid" draw:fill-color="#f1f1f1"/>
    </style:style>
    <style:style style:name="P27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28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29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T1" style:family="text">
      <style:text-properties fo:color="#000000" loext:opacity="100%" style:font-name="Noto Sans1" fo:font-size="10.5pt" fo:font-weight="normal" style:font-name-asian="Noto Sans1" style:font-size-asian="10.5pt" style:font-weight-asian="normal" style:font-name-complex="Noto Sans1" style:font-size-complex="10.5pt" style:font-weight-complex="normal"/>
    </style:style>
    <style:style style:name="T2" style:family="text">
      <style:text-properties fo:color="#ffffff" loext:opacity="100%" style:font-name="Noto Sans1" fo:font-size="10.5pt" fo:font-weight="normal" style:font-name-asian="Noto Sans1" style:font-size-asian="10.5pt" style:font-weight-asian="normal" style:font-name-complex="Noto Sans1" style:font-size-complex="10.5pt" style:font-weight-complex="normal"/>
    </style:style>
    <style:style style:name="T3" style:family="text">
      <style:text-properties fo:color="#000000" loext:opacity="100%" style:font-name="Noto Sans1" fo:font-size="15pt" fo:font-weight="normal" style:font-name-asian="Noto Sans1" style:font-size-asian="15pt" style:font-weight-asian="normal" style:font-name-complex="Noto Sans1" style:font-size-complex="15pt" style:font-weight-complex="normal"/>
    </style:style>
    <style:style style:name="T4" style:family="text">
      <style:text-properties fo:color="#c00000" loext:opacity="100%" style:font-name="Noto Sans1" fo:font-size="11pt" fo:font-weight="normal" style:font-name-asian="Noto Sans1" style:font-size-asian="11pt" style:font-weight-asian="normal" style:font-name-complex="Noto Sans1" style:font-size-complex="11pt" style:font-weight-complex="normal"/>
    </style:style>
    <style:style style:name="T5" style:family="text">
      <style:text-properties fo:color="#000000" loext:opacity="100%" style:font-name="Noto Sans1" fo:font-size="14pt" fo:font-weight="normal" style:font-name-asian="Noto Sans1" style:font-size-asian="14pt" style:font-weight-asian="normal" style:font-name-complex="Noto Sans1" style:font-size-complex="14pt" style:font-weight-complex="normal"/>
    </style:style>
    <style:style style:name="T6" style:family="text">
      <style:text-properties fo:color="#000000" loext:opacity="100%" style:font-name="Noto Sans1" fo:font-size="12pt" fo:font-weight="normal" style:font-name-asian="Noto Sans1" style:font-size-asian="12pt" style:font-weight-asian="normal" style:font-name-complex="Noto Sans1" style:font-size-complex="12pt" style:font-weight-complex="normal"/>
    </style:style>
    <style:style style:name="T7" style:family="text">
      <style:text-properties fo:color="#000000" loext:opacity="100%" style:font-name="Noto Sans1" fo:font-size="10.5pt" fo:font-weight="bold" style:font-name-asian="Noto Sans1" style:font-size-asian="10.5pt" style:font-weight-asian="bold" style:font-name-complex="Noto Sans1" style:font-size-complex="10.5pt" style:font-weight-complex="bold"/>
    </style:style>
    <style:style style:name="T8" style:family="text">
      <style:text-properties fo:color="#000000" loext:opacity="100%" style:font-name="Noto Sans1" fo:font-size="11pt" fo:font-weight="normal" style:font-name-asian="Noto Sans1" style:font-size-asian="11pt" style:font-weight-asian="normal" style:font-name-complex="Noto Sans1" style:font-size-complex="11pt" style:font-weight-complex="normal" style:text-scale="119%"/>
    </style:style>
    <style:style style:name="T9" style:family="text">
      <style:text-properties fo:color="#000000" loext:opacity="100%" style:font-name="Noto Sans1" fo:font-size="11pt" fo:font-weight="normal" style:font-name-asian="Noto Sans1" style:font-size-asian="11pt" style:font-weight-asian="normal" style:font-name-complex="Noto Sans1" style:font-size-complex="11pt" style:font-weight-complex="normal" style:text-scale="115%"/>
    </style:style>
    <style:style style:name="T10" style:family="text">
      <style:text-properties fo:color="#000000" loext:opacity="100%" style:font-name="Noto Sans1" fo:font-size="10pt" fo:font-weight="normal" style:font-name-asian="Noto Sans1" style:font-size-asian="10pt" style:font-weight-asian="normal" style:font-name-complex="Noto Sans1" style:font-size-complex="10pt" style:font-weight-complex="normal"/>
    </style:style>
    <style:style style:name="T11" style:family="text">
      <style:text-properties fo:color="#000000" loext:opacity="100%" style:font-name="Noto Sans1" fo:font-size="9pt" fo:font-weight="bold" style:font-name-asian="Noto Sans1" style:font-size-asian="9pt" style:font-weight-asian="bold" style:font-name-complex="Noto Sans1" style:font-size-complex="9pt" style:font-weight-complex="bold"/>
    </style:style>
    <style:style style:name="T12" style:family="text">
      <style:text-properties fo:color="#000000" loext:opacity="100%" style:font-name="Noto Sans1" fo:font-size="11pt" fo:font-weight="normal" style:font-name-asian="Noto Sans1" style:font-size-asian="11pt" style:font-weight-asian="normal" style:font-name-complex="Noto Sans1" style:font-size-complex="11pt" style:font-weight-complex="normal"/>
    </style:style>
    <style:style style:name="T13" style:family="text">
      <style:text-properties fo:color="#000000" loext:opacity="100%" style:font-name="Noto Sans1" fo:font-size="10pt" fo:font-weight="bold" style:font-name-asian="Noto Sans1" style:font-size-asian="10pt" style:font-weight-asian="bold" style:font-name-complex="Noto Sans1" style:font-size-complex="10pt" style:font-weight-complex="bold"/>
    </style:style>
    <style:style style:name="T14" style:family="text">
      <style:text-properties fo:color="#000000" loext:opacity="100%" style:font-name="Noto Sans1" fo:font-size="11pt" fo:font-weight="normal" style:font-name-asian="Noto Sans1" style:font-size-asian="11pt" style:font-weight-asian="normal" style:font-name-complex="Noto Sans1" style:font-size-complex="11pt" style:font-weight-complex="normal" style:text-scale="109%"/>
    </style:style>
    <style:style style:name="T15" style:family="text">
      <style:text-properties fo:color="#ffffff" loext:opacity="100%" style:font-name="Noto Sans1" fo:font-size="12pt" fo:font-weight="normal" style:font-name-asian="Noto Sans1" style:font-size-asian="12pt" style:font-weight-asian="normal" style:font-name-complex="Noto Sans1" style:font-size-complex="12pt" style:font-weight-complex="normal"/>
    </style:style>
    <style:style style:name="T16" style:family="text">
      <style:text-properties fo:color="#000000" loext:opacity="100%" style:font-name="Noto Sans1" fo:font-size="11.6999998092651pt" fo:font-weight="normal" style:font-name-asian="Noto Sans1" style:font-size-asian="11.6999998092651pt" style:font-weight-asian="normal" style:font-name-complex="Noto Sans1" style:font-size-complex="11.6999998092651pt" style:font-weight-complex="normal"/>
    </style:style>
    <style:style style:name="T17" style:family="text">
      <style:text-properties fo:color="#000000" loext:opacity="100%" style:font-name="Noto Sans1" fo:font-size="11.6999998092651pt" fo:font-weight="bold" style:font-name-asian="Noto Sans1" style:font-size-asian="11.6999998092651pt" style:font-weight-asian="bold" style:font-name-complex="Noto Sans1" style:font-size-complex="11.6999998092651pt" style:font-weight-complex="bold"/>
    </style:style>
    <style:style style:name="T18" style:family="text">
      <style:text-properties fo:color="#000000" loext:opacity="100%" style:font-name="Noto Sans1" fo:font-size="11pt" fo:font-weight="bold" style:font-name-asian="Noto Sans1" style:font-size-asian="11pt" style:font-weight-asian="bold" style:font-name-complex="Noto Sans1" style:font-size-complex="11pt" style:font-weight-complex="bold"/>
    </style:style>
    <style:style style:name="T19" style:family="text">
      <style:text-properties fo:color="#000000" loext:opacity="100%" style:font-name="Noto Sans1" fo:font-size="8.80000019073486pt" fo:font-weight="normal" style:font-name-asian="Noto Sans1" style:font-size-asian="8.80000019073486pt" style:font-weight-asian="normal" style:font-name-complex="Noto Sans1" style:font-size-complex="8.80000019073486pt" style:font-weight-complex="normal"/>
    </style:style>
    <style:style style:name="T20" style:family="text">
      <style:text-properties fo:color="#000000" loext:opacity="100%" style:font-name="Noto Sans1" fo:font-size="12.6000003814697pt" fo:font-weight="normal" style:font-name-asian="Noto Sans1" style:font-size-asian="12.6000003814697pt" style:font-weight-asian="normal" style:font-name-complex="Noto Sans1" style:font-size-complex="12.6000003814697pt" style:font-weight-complex="normal"/>
    </style:style>
    <style:style style:name="T21" style:family="text">
      <style:text-properties fo:color="#c00000" loext:opacity="100%" style:font-name="Noto Sans1" fo:font-size="11.6999998092651pt" fo:font-weight="normal" style:font-name-asian="Noto Sans1" style:font-size-asian="11.6999998092651pt" style:font-weight-asian="normal" style:font-name-complex="Noto Sans1" style:font-size-complex="11.6999998092651pt" style:font-weight-complex="normal"/>
    </style:style>
    <style:style style:name="T22" style:family="text">
      <style:text-properties fo:color="#000000" loext:opacity="100%" style:font-name="Noto Sans1" fo:font-size="10.6999998092651pt" fo:font-weight="normal" style:font-name-asian="Noto Sans1" style:font-size-asian="10.6999998092651pt" style:font-weight-asian="normal" style:font-name-complex="Noto Sans1" style:font-size-complex="10.6999998092651pt" style:font-weight-complex="normal"/>
    </style:style>
    <style:style style:name="T23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 style:text-scale="11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7cm" svg:x="0cm" svg:y="0.051cm" svg:viewBox="0 0 21000 29701" draw:points="0,0 21000,0 21000,29701 0,29701">
          <text:p/>
        </draw:polygon>
        <draw:frame draw:style-name="gr2" draw:text-style-name="P2" draw:layer="layout" svg:width="18.001cm" svg:height="0.082cm" svg:x="1.833cm" svg:y="13.862cm">
          <draw:image xlink:href="Pictures/10000000000008890000000A8DEC253B.png" xlink:type="simple" xlink:show="embed" xlink:actuate="onLoad" draw:mime-type="image/png">
            <text:p/>
          </draw:image>
        </draw:frame>
        <draw:polygon draw:style-name="gr3" draw:text-style-name="P3" draw:layer="layout" svg:width="0.179cm" svg:height="0.551cm" svg:x="1.853cm" svg:y="13.647cm" svg:viewBox="0 0 180 552" draw:points="0,0 180,0 180,552 0,552">
          <text:p/>
        </draw:polygon>
        <draw:frame draw:style-name="gr2" draw:text-style-name="P2" draw:layer="layout" svg:width="0.505cm" svg:height="0.069cm" svg:x="1.85cm" svg:y="13.888cm">
          <draw:image xlink:href="Pictures/100000000000003E00000009002CA445.png" xlink:type="simple" xlink:show="embed" xlink:actuate="onLoad" draw:mime-type="image/png">
            <text:p/>
          </draw:image>
        </draw:frame>
        <draw:polygon draw:style-name="gr3" draw:text-style-name="P3" draw:layer="layout" svg:width="0.182cm" svg:height="0.551cm" svg:x="11.008cm" svg:y="13.647cm" svg:viewBox="0 0 183 552" draw:points="0,0 183,0 183,552 0,552">
          <text:p/>
        </draw:polygon>
        <draw:frame draw:style-name="gr2" draw:text-style-name="P2" draw:layer="layout" svg:width="0.509cm" svg:height="0.069cm" svg:x="11.002cm" svg:y="13.888cm">
          <draw:image xlink:href="Pictures/100000000000003E0000000986BCDF38.png" xlink:type="simple" xlink:show="embed" xlink:actuate="onLoad" draw:mime-type="image/png">
            <text:p/>
          </draw:image>
        </draw:frame>
        <draw:polygon draw:style-name="gr3" draw:text-style-name="P3" draw:layer="layout" svg:width="8.977cm" svg:height="0.551cm" svg:x="2.034cm" svg:y="13.647cm" svg:viewBox="0 0 8978 552" draw:points="0,0 8978,0 8978,552 0,552">
          <text:p/>
        </draw:polygon>
        <draw:frame draw:style-name="gr2" draw:text-style-name="P2" draw:layer="layout" svg:width="8.989cm" svg:height="0.069cm" svg:x="2.028cm" svg:y="13.888cm">
          <draw:image xlink:href="Pictures/100000000000044300000009C3645821.png" xlink:type="simple" xlink:show="embed" xlink:actuate="onLoad" draw:mime-type="image/png">
            <text:p/>
          </draw:image>
        </draw:frame>
        <draw:frame draw:style-name="gr4" draw:text-style-name="P5" draw:layer="layout" svg:width="0.369cm" svg:height="0.401cm" svg:x="2.083cm" svg:y="13.815cm">
          <draw:text-box>
            <text:p text:style-name="P4"><text:span text:style-name="T1"><text:s/></text:span></text:p>
          </draw:text-box>
        </draw:frame>
        <draw:polygon draw:style-name="gr3" draw:text-style-name="P3" draw:layer="layout" svg:width="0.179cm" svg:height="0.551cm" svg:x="11.204cm" svg:y="13.647cm" svg:viewBox="0 0 180 552" draw:points="0,0 180,0 180,552 0,552">
          <text:p/>
        </draw:polygon>
        <draw:frame draw:style-name="gr2" draw:text-style-name="P2" draw:layer="layout" svg:width="0.509cm" svg:height="0.069cm" svg:x="11.193cm" svg:y="13.888cm">
          <draw:image xlink:href="Pictures/100000000000003E00000009CFBFE20C.png" xlink:type="simple" xlink:show="embed" xlink:actuate="onLoad" draw:mime-type="image/png">
            <text:p/>
          </draw:image>
        </draw:frame>
        <draw:frame draw:style-name="gr4" draw:text-style-name="P5" draw:layer="layout" svg:width="0.369cm" svg:height="0.401cm" svg:x="2.1cm" svg:y="13.845cm">
          <draw:text-box>
            <text:p text:style-name="P4"><text:span text:style-name="T2"><text:s/></text:span></text:p>
          </draw:text-box>
        </draw:frame>
        <draw:polygon draw:style-name="gr3" draw:text-style-name="P3" draw:layer="layout" svg:width="0.182cm" svg:height="0.551cm" svg:x="19.67cm" svg:y="13.647cm" svg:viewBox="0 0 183 552" draw:points="0,0 183,0 183,552 0,552">
          <text:p/>
        </draw:polygon>
        <draw:frame draw:style-name="gr2" draw:text-style-name="P2" draw:layer="layout" svg:width="0.505cm" svg:height="0.069cm" svg:x="19.66cm" svg:y="13.888cm">
          <draw:image xlink:href="Pictures/100000000000003E00000009CE56A4D2.png" xlink:type="simple" xlink:show="embed" xlink:actuate="onLoad" draw:mime-type="image/png">
            <text:p/>
          </draw:image>
        </draw:frame>
        <draw:frame draw:style-name="gr4" draw:text-style-name="P5" draw:layer="layout" svg:width="0.369cm" svg:height="0.401cm" svg:x="11.256cm" svg:y="13.845cm">
          <draw:text-box>
            <text:p text:style-name="P4"><text:span text:style-name="T2"><text:s/></text:span></text:p>
          </draw:text-box>
        </draw:frame>
        <draw:polygon draw:style-name="gr3" draw:text-style-name="P3" draw:layer="layout" svg:width="8.618cm" svg:height="0.551cm" svg:x="11.383cm" svg:y="13.647cm" svg:viewBox="0 0 8619 552" draw:points="0,0 8619,0 8619,552 0,552">
          <text:p/>
        </draw:polygon>
        <draw:frame draw:style-name="gr2" draw:text-style-name="P2" draw:layer="layout" svg:width="8.294cm" svg:height="0.069cm" svg:x="11.375cm" svg:y="13.888cm">
          <draw:image xlink:href="Pictures/10000000000003EF000000091C0A26A6.png" xlink:type="simple" xlink:show="embed" xlink:actuate="onLoad" draw:mime-type="image/png">
            <text:p/>
          </draw:image>
        </draw:frame>
        <draw:frame draw:style-name="gr4" draw:text-style-name="P5" draw:layer="layout" svg:width="0.369cm" svg:height="0.401cm" svg:x="2.278cm" svg:y="13.845cm">
          <draw:text-box>
            <text:p text:style-name="P4"><text:span text:style-name="T2"><text:s/></text:span></text:p>
          </draw:text-box>
        </draw:frame>
        <draw:line draw:style-name="gr5" draw:text-style-name="P2" draw:layer="layout" svg:x1="1.853cm" svg:y1="13.638cm" svg:x2="11.187cm" svg:y2="13.638cm">
          <text:p/>
        </draw:line>
        <draw:line draw:style-name="gr5" draw:text-style-name="P2" draw:layer="layout" svg:x1="11.204cm" svg:y1="13.638cm" svg:x2="19.849cm" svg:y2="13.638cm">
          <text:p/>
        </draw:line>
        <draw:line draw:style-name="gr5" draw:text-style-name="P2" draw:layer="layout" svg:x1="1.844cm" svg:y1="13.631cm" svg:x2="1.844cm" svg:y2="14.218cm">
          <text:p/>
        </draw:line>
        <draw:line draw:style-name="gr5" draw:text-style-name="P2" draw:layer="layout" svg:x1="1.853cm" svg:y1="14.207cm" svg:x2="11.187cm" svg:y2="14.207cm">
          <text:p/>
        </draw:line>
        <draw:line draw:style-name="gr5" draw:text-style-name="P2" draw:layer="layout" svg:x1="11.196cm" svg:y1="13.631cm" svg:x2="11.196cm" svg:y2="14.218cm">
          <text:p/>
        </draw:line>
        <draw:line draw:style-name="gr5" draw:text-style-name="P2" draw:layer="layout" svg:x1="11.204cm" svg:y1="14.207cm" svg:x2="19.849cm" svg:y2="14.207cm">
          <text:p/>
        </draw:line>
        <draw:line draw:style-name="gr5" draw:text-style-name="P2" draw:layer="layout" svg:x1="19.858cm" svg:y1="13.631cm" svg:x2="19.858cm" svg:y2="14.215cm">
          <text:p/>
        </draw:line>
        <draw:frame draw:style-name="gr4" draw:text-style-name="P5" draw:layer="layout" svg:width="0.369cm" svg:height="0.401cm" svg:x="11.451cm" svg:y="13.845cm">
          <draw:text-box>
            <text:p text:style-name="P4"><text:span text:style-name="T2"><text:s/></text:span></text:p>
          </draw:text-box>
        </draw:frame>
        <draw:frame draw:style-name="gr4" draw:text-style-name="P5" draw:layer="layout" svg:width="0.369cm" svg:height="0.401cm" svg:x="19.914cm" svg:y="13.845cm">
          <draw:text-box>
            <text:p text:style-name="P4"><text:span text:style-name="T2"><text:s/></text:span></text:p>
          </draw:text-box>
        </draw:frame>
        <draw:frame draw:style-name="gr4" draw:text-style-name="P5" draw:layer="layout" svg:width="0.369cm" svg:height="0.401cm" svg:x="11.625cm" svg:y="13.845cm">
          <draw:text-box>
            <text:p text:style-name="P4"><text:span text:style-name="T2"><text:s/></text:span></text:p>
          </draw:text-box>
        </draw:frame>
        <draw:frame draw:style-name="gr6" draw:text-style-name="P6" draw:layer="layout" svg:width="1.067cm" svg:height="0.58cm" svg:x="3.412cm" svg:y="4.238cm">
          <draw:text-box>
            <text:p text:style-name="P4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/text:p>
          </draw:text-box>
        </draw:frame>
        <draw:frame draw:style-name="gr6" draw:text-style-name="P6" draw:layer="layout" svg:width="19.655cm" svg:height="0.58cm" svg:x="8.899cm" svg:y="2.663cm">
          <draw:text-box>
            <text:p text:style-name="P4"><text:span text:style-name="T3">Hope Foundation's <text:s text:c="39"/></text:span><text:span text:style-name="T3"><text:s text:c="68"/></text:span></text:p>
          </draw:text-box>
        </draw:frame>
        <draw:frame draw:style-name="gr6" draw:text-style-name="P6" draw:layer="layout" svg:width="13.916cm" svg:height="0.58cm" svg:x="4.559cm" svg:y="3.294cm">
          <draw:text-box>
            <text:p text:style-name="P4"><text:span text:style-name="T3">International Institute of Information </text:span><text:span text:style-name="T3">Technology, Pune</text:span></text:p>
          </draw:text-box>
        </draw:frame>
        <draw:frame draw:style-name="gr6" draw:text-style-name="P6" draw:layer="layout" svg:width="0.528cm" svg:height="0.58cm" svg:x="17.717cm" svg:y="3.28cm">
          <draw:text-box>
            <text:p text:style-name="P4"><text:span text:style-name="T3"><text:s/></text:span></text:p>
          </draw:text-box>
        </draw:frame>
        <draw:frame draw:style-name="gr6" draw:text-style-name="P6" draw:layer="layout" svg:width="9.913cm" svg:height="0.58cm" svg:x="6.49cm" svg:y="3.925cm">
          <draw:text-box>
            <text:p text:style-name="P4"><text:span text:style-name="T3">D</text:span><text:span text:style-name="T3">e</text:span><text:span text:style-name="T3">p</text:span><text:span text:style-name="T3">a</text:span><text:span text:style-name="T3">r</text:span><text:span text:style-name="T3">t</text:span><text:span text:style-name="T3">m</text:span><text:span text:style-name="T3">e</text:span><text:span text:style-name="T3">n</text:span><text:span text:style-name="T3">t</text:span><text:span text:style-name="T3"> </text:span><text:span text:style-name="T3">o</text:span><text:span text:style-name="T3">f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y</text:span></text:p>
          </draw:text-box>
        </draw:frame>
        <draw:frame draw:style-name="gr6" draw:text-style-name="P6" draw:layer="layout" svg:width="0.528cm" svg:height="0.58cm" svg:x="15.782cm" svg:y="3.912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.218cm" svg:height="0.424cm" svg:x="7.37cm" svg:y="4.902cm">
          <draw:text-box>
            <text:p text:style-name="P4"><text:span text:style-name="T4"><text:s text:c="11"/></text:span></text:p>
          </draw:text-box>
        </draw:frame>
        <draw:frame draw:style-name="gr8" draw:text-style-name="P8" draw:layer="layout" svg:width="6.066cm" svg:height="0.539cm" svg:x="8.505cm" svg:y="4.877cm">
          <draw:text-box>
            <text:p text:style-name="P4"><text:span text:style-name="T5">(</text:span><text:span text:style-name="T5">A</text:span><text:span text:style-name="T5">c</text:span><text:span text:style-name="T5">a</text:span><text:span text:style-name="T5">d</text:span><text:span text:style-name="T5">e</text:span><text:span text:style-name="T5">m</text:span><text:span text:style-name="T5">i</text:span><text:span text:style-name="T5">c</text:span><text:span text:style-name="T5"> </text:span><text:span text:style-name="T5">Y</text:span><text:span text:style-name="T5">e</text:span><text:span text:style-name="T5">a</text:span><text:span text:style-name="T5">r</text:span><text:span text:style-name="T5">:</text:span><text:span text:style-name="T5"> </text:span><text:span text:style-name="T5">2</text:span><text:span text:style-name="T5">0</text:span><text:span text:style-name="T5">2</text:span><text:span text:style-name="T5">5</text:span><text:span text:style-name="T5">-</text:span><text:span text:style-name="T5">2</text:span><text:span text:style-name="T5">6</text:span><text:span text:style-name="T5">)</text:span><text:span text:style-name="T5"> </text:span></text:p>
          </draw:text-box>
        </draw:frame>
        <draw:frame draw:style-name="gr9" draw:text-style-name="P9" draw:layer="layout" svg:width="9.68cm" svg:height="0.462cm" svg:x="5.097cm" svg:y="5.479cm">
          <draw:text-box>
            <text:p text:style-name="P4"><text:span text:style-name="T6">Class: BE IT <text:s text:c="22"/>SEM: I <text:s text:c="20"/>Date: <text:s/></text:span></text:p>
          </draw:text-box>
        </draw:frame>
        <draw:frame draw:style-name="gr10" draw:text-style-name="P10" draw:layer="layout" svg:width="2.07cm" svg:height="0.501cm" svg:x="14.605cm" svg:y="5.493cm">
          <draw:text-box>
            <text:p text:style-name="P4"><text:span text:style-name="T1">{{dat</text:span><text:span text:style-name="T1">e}} </text:span></text:p>
          </draw:text-box>
        </draw:frame>
        <draw:frame draw:style-name="gr9" draw:text-style-name="P9" draw:layer="layout" svg:width="0.422cm" svg:height="0.462cm" svg:x="10.82cm" svg:y="5.996cm">
          <draw:text-box>
            <text:p text:style-name="P4"><text:span text:style-name="T6"><text:s/></text:span></text:p>
          </draw:text-box>
        </draw:frame>
        <draw:frame draw:style-name="gr9" draw:text-style-name="P9" draw:layer="layout" svg:width="3.51cm" svg:height="0.462cm" svg:x="9.131cm" svg:y="6.508cm">
          <draw:text-box>
            <text:p text:style-name="P4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 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text:span text:style-name="T6"> </text:span><text:span text:style-name="T6">I</text:span><text:span text:style-name="T6">I</text:span><text:span text:style-name="T6"> </text:span></text:p>
          </draw:text-box>
        </draw:frame>
        <draw:frame draw:style-name="gr11" draw:text-style-name="P12" draw:layer="layout" svg:width="2.425cm" svg:height="0.501cm" svg:x="2.972cm" svg:y="7.101cm">
          <draw:text-box>
            <text:p text:style-name="P11"><text:span text:style-name="T7">G</text:span><text:span text:style-name="T7">r</text:span><text:span text:style-name="T7">o</text:span><text:span text:style-name="T7">u</text:span><text:span text:style-name="T7">p</text:span><text:span text:style-name="T7"> </text:span><text:span text:style-name="T7">I</text:span><text:span text:style-name="T7">d</text:span><text:span text:style-name="T7"> </text:span><text:span text:style-name="T7">:</text:span></text:p>
          </draw:text-box>
        </draw:frame>
        <draw:frame draw:style-name="gr4" draw:text-style-name="P5" draw:layer="layout" svg:width="0.369cm" svg:height="0.401cm" svg:x="4.712cm" svg:y="7.093cm">
          <draw:text-box>
            <text:p text:style-name="P4"><text:span text:style-name="T1"><text:s/></text:span></text:p>
          </draw:text-box>
        </draw:frame>
        <draw:frame draw:style-name="gr4" draw:text-style-name="P10" draw:layer="layout" svg:width="2.875cm" svg:height="0.401cm" svg:x="5.791cm" svg:y="7.137cm">
          <draw:text-box>
            <text:p text:style-name="P4"><text:span text:style-name="T1"><text:s text:c="2"/></text:span><text:span text:style-name="T1"><text:s text:c="2"/></text:span><text:span text:style-name="T1"><text:s text:c="2"/></text:span><text:span text:style-name="T1">{</text:span><text:span text:style-name="T1">{</text:span><text:span text:style-name="T1">g</text:span><text:span text:style-name="T1">r</text:span><text:span text:style-name="T1">o</text:span><text:span text:style-name="T1">u</text:span><text:span text:style-name="T1">p</text:span><text:span text:style-name="T1">_</text:span><text:span text:style-name="T1">i</text:span><text:span text:style-name="T1">d</text:span><text:span text:style-name="T1">}</text:span><text:span text:style-name="T1">}</text:span><text:span text:style-name="T1"> </text:span></text:p>
          </draw:text-box>
        </draw:frame>
        <draw:frame draw:style-name="gr4" draw:text-style-name="P12" draw:layer="layout" svg:width="1.273cm" svg:height="0.401cm" svg:x="14.326cm" svg:y="7.137cm">
          <draw:text-box>
            <text:p text:style-name="P11"><text:span text:style-name="T7"><text:s/>Date :</text:span></text:p>
          </draw:text-box>
        </draw:frame>
        <draw:polygon draw:style-name="gr3" draw:text-style-name="P3" draw:layer="layout" svg:width="18.057cm" svg:height="0.021cm" svg:x="1.887cm" svg:y="7.071cm" svg:viewBox="0 0 18058 22" draw:points="0,0 18058,0 18058,22 0,22">
          <text:p/>
        </draw:polygon>
        <draw:path draw:style-name="gr3" draw:text-style-name="P3" draw:layer="layout" svg:width="18.075cm" svg:height="0.546cm" svg:x="1.887cm" svg:y="7.071cm" svg:viewBox="0 0 18076 547" svg:d="M18058 0h18v18h-18zM0 18h17v529h-17zM3891 18h17v529h-17zM12410 18h17v529h-17z">
          <text:p/>
        </draw:path>
        <draw:polygon draw:style-name="gr3" draw:text-style-name="P3" draw:layer="layout" svg:width="0.021cm" svg:height="0.528cm" svg:x="19.941cm" svg:y="7.089cm" svg:viewBox="0 0 22 529" draw:points="0,0 22,0 22,529 0,529">
          <text:p/>
        </draw:polygon>
        <draw:frame draw:style-name="gr12" draw:text-style-name="P7" draw:layer="layout" svg:width="0.46cm" svg:height="0.424cm" svg:x="15.295cm" svg:y="7.048cm">
          <draw:text-box>
            <text:p text:style-name="P4"><text:span text:style-name="T8"><text:s/></text:span></text:p>
          </draw:text-box>
        </draw:frame>
        <draw:frame draw:style-name="gr4" draw:text-style-name="P10" draw:layer="layout" svg:width="1.629cm" svg:height="0.401cm" svg:x="15.545cm" svg:y="7.137cm">
          <draw:text-box>
            <text:p text:style-name="P4"><text:span text:style-name="T1"><text:s text:c="2"/></text:span><text:span text:style-name="T1">{</text:span><text:span text:style-name="T1">{</text:span><text:span text:style-name="T1">d</text:span><text:span text:style-name="T1">a</text:span><text:span text:style-name="T1">t</text:span><text:span text:style-name="T1">e</text:span><text:span text:style-name="T1">}</text:span><text:span text:style-name="T1">}</text:span></text:p>
          </draw:text-box>
        </draw:frame>
        <draw:frame draw:style-name="gr4" draw:text-style-name="P5" draw:layer="layout" svg:width="0.369cm" svg:height="0.401cm" svg:x="16.713cm" svg:y="7.038cm">
          <draw:text-box>
            <text:p text:style-name="P4"><text:span text:style-name="T1"><text:s/></text:span></text:p>
          </draw:text-box>
        </draw:frame>
        <draw:frame draw:style-name="gr4" draw:text-style-name="P13" draw:layer="layout" svg:width="2.809cm" svg:height="0.401cm" svg:x="1.905cm" svg:y="7.728cm">
          <draw:text-box>
            <text:p text:style-name="P11"><text:span text:style-name="T7"><text:s text:c="3"/></text:span><text:span text:style-name="T7">Project </text:span><text:span text:style-name="T7">Title :</text:span></text:p>
          </draw:text-box>
        </draw:frame>
        <draw:polygon draw:style-name="gr3" draw:text-style-name="P3" draw:layer="layout" svg:width="18.057cm" svg:height="0.014cm" svg:x="1.887cm" svg:y="7.614cm" svg:viewBox="0 0 18058 15" draw:points="0,0 18058,0 18058,15 0,15">
          <text:p/>
        </draw:polygon>
        <draw:path draw:style-name="gr3" draw:text-style-name="P3" draw:layer="layout" svg:width="18.075cm" svg:height="1.183cm" svg:x="1.887cm" svg:y="7.614cm" svg:viewBox="0 0 18076 1184" svg:d="M18058 0h18v14h-18zM0 14h17v1170h-17z">
          <text:p/>
        </draw:path>
        <draw:polygon draw:style-name="gr3" draw:text-style-name="P3" draw:layer="layout" svg:width="0.021cm" svg:height="1.169cm" svg:x="19.941cm" svg:y="7.628cm" svg:viewBox="0 0 22 1170" draw:points="0,0 22,0 22,1170 0,1170">
          <text:p/>
        </draw:polygon>
        <draw:frame draw:style-name="gr13" draw:text-style-name="P7" draw:layer="layout" svg:width="0.445cm" svg:height="0.424cm" svg:x="4.149cm" svg:y="7.734cm">
          <draw:text-box>
            <text:p text:style-name="P4"><text:span text:style-name="T9"><text:s/></text:span></text:p>
          </draw:text-box>
        </draw:frame>
        <draw:frame draw:style-name="gr4" draw:text-style-name="P10" draw:layer="layout" svg:width="3.375cm" svg:height="0.401cm" svg:x="4.263cm" svg:y="7.728cm">
          <draw:text-box>
            <text:p text:style-name="P4"><text:span text:style-name="T1"><text:s text:c="2"/></text:span><text:span text:style-name="T1"><text:s text:c="2"/></text:span><text:span text:style-name="T1"><text:s text:c="2"/></text:span><text:span text:style-name="T1">{</text:span><text:span text:style-name="T1">{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_</text:span><text:span text:style-name="T1">t</text:span><text:span text:style-name="T1">i</text:span><text:span text:style-name="T1">t</text:span><text:span text:style-name="T1">l</text:span><text:span text:style-name="T1">e</text:span><text:span text:style-name="T1">}</text:span><text:span text:style-name="T1">}</text:span><text:span text:style-name="T1"> </text:span></text:p>
          </draw:text-box>
        </draw:frame>
        <draw:frame draw:style-name="gr4" draw:text-style-name="P5" draw:layer="layout" svg:width="0.369cm" svg:height="0.401cm" svg:x="1.905cm" svg:y="8.304cm">
          <draw:text-box>
            <text:p text:style-name="P4"><text:span text:style-name="T1"><text:s/></text:span></text:p>
          </draw:text-box>
        </draw:frame>
        <draw:frame draw:style-name="gr4" draw:text-style-name="P13" draw:layer="layout" svg:width="1.307cm" svg:height="0.401cm" svg:x="2.032cm" svg:y="8.917cm">
          <draw:text-box>
            <text:p text:style-name="P11"><text:span text:style-name="T7">Sr. No.</text:span></text:p>
          </draw:text-box>
        </draw:frame>
        <draw:frame draw:style-name="gr4" draw:text-style-name="P5" draw:layer="layout" svg:width="0.369cm" svg:height="0.401cm" svg:x="3.154cm" svg:y="8.909cm">
          <draw:text-box>
            <text:p text:style-name="P4"><text:span text:style-name="T1"><text:s/></text:span></text:p>
          </draw:text-box>
        </draw:frame>
        <draw:frame draw:style-name="gr4" draw:text-style-name="P13" draw:layer="layout" svg:width="1.519cm" svg:height="0.401cm" svg:x="3.361cm" svg:y="8.917cm">
          <draw:text-box>
            <text:p text:style-name="P11"><text:span text:style-name="T7"><text:s/></text:span><text:span text:style-name="T7">R</text:span><text:span text:style-name="T7">o</text:span><text:span text:style-name="T7">l</text:span><text:span text:style-name="T7">l</text:span><text:span text:style-name="T7"> </text:span><text:span text:style-name="T7">N</text:span><text:span text:style-name="T7">o</text:span></text:p>
          </draw:text-box>
        </draw:frame>
        <draw:frame draw:style-name="gr4" draw:text-style-name="P5" draw:layer="layout" svg:width="0.369cm" svg:height="0.401cm" svg:x="4.589cm" svg:y="8.909cm">
          <draw:text-box>
            <text:p text:style-name="P4"><text:span text:style-name="T1"><text:s/></text:span></text:p>
          </draw:text-box>
        </draw:frame>
        <draw:frame draw:style-name="gr4" draw:text-style-name="P13" draw:layer="layout" svg:width="2.854cm" svg:height="0.401cm" svg:x="5.795cm" svg:y="8.917cm">
          <draw:text-box>
            <text:p text:style-name="P11"><text:span text:style-name="T7"><text:s/>Student Name</text:span></text:p>
          </draw:text-box>
        </draw:frame>
        <draw:frame draw:style-name="gr4" draw:text-style-name="P5" draw:layer="layout" svg:width="0.369cm" svg:height="0.401cm" svg:x="8.094cm" svg:y="8.909cm">
          <draw:text-box>
            <text:p text:style-name="P4"><text:span text:style-name="T1"><text:s/></text:span></text:p>
          </draw:text-box>
        </draw:frame>
        <draw:frame draw:style-name="gr4" draw:text-style-name="P13" draw:layer="layout" svg:width="3.012cm" svg:height="0.401cm" svg:x="10.668cm" svg:y="8.939cm">
          <draw:text-box>
            <text:p text:style-name="P11"><text:span text:style-name="T7"><text:s/>Contact </text:span><text:span text:style-name="T7">Details</text:span></text:p>
          </draw:text-box>
        </draw:frame>
        <draw:polygon draw:style-name="gr3" draw:text-style-name="P3" draw:layer="layout" svg:width="18.057cm" svg:height="0.02cm" svg:x="1.887cm" svg:y="8.795cm" svg:viewBox="0 0 18058 21" draw:points="0,0 18058,0 18058,21 0,21">
          <text:p/>
        </draw:polygon>
        <draw:path draw:style-name="gr3" draw:text-style-name="P3" draw:layer="layout" svg:width="18.075cm" svg:height="0.782cm" svg:x="1.887cm" svg:y="8.795cm" svg:viewBox="0 0 18076 783" svg:d="M18058 0h18v17h-18zM0 17h17v766h-17zM1457 17h15v766h-15zM3891 17h17v766h-17zM8765 17h17v766h-17zM12410 17h17v766h-17z">
          <text:p/>
        </draw:path>
        <draw:polygon draw:style-name="gr3" draw:text-style-name="P3" draw:layer="layout" svg:width="0.021cm" svg:height="0.765cm" svg:x="19.941cm" svg:y="8.812cm" svg:viewBox="0 0 22 766" draw:points="0,0 22,0 22,766 0,766">
          <text:p/>
        </draw:polygon>
        <draw:frame draw:style-name="gr4" draw:text-style-name="P5" draw:layer="layout" svg:width="0.369cm" svg:height="0.401cm" svg:x="13.153cm" svg:y="8.93cm">
          <draw:text-box>
            <text:p text:style-name="P4"><text:span text:style-name="T1"><text:s/></text:span></text:p>
          </draw:text-box>
        </draw:frame>
        <draw:frame draw:style-name="gr4" draw:text-style-name="P15" draw:layer="layout" svg:width="5.311cm" svg:height="0.384cm" svg:x="14.313cm" svg:y="8.939cm">
          <draw:text-box>
            <text:p text:style-name="P14"><text:span text:style-name="T10"><text:s/></text:span><text:span text:style-name="T11">Internal / </text:span><text:span text:style-name="T11">External </text:span><text:span text:style-name="T11">Guide </text:span><text:span text:style-name="T11">Details</text:span></text:p>
          </draw:text-box>
        </draw:frame>
        <draw:frame draw:style-name="gr4" draw:text-style-name="P5" draw:layer="layout" svg:width="0.369cm" svg:height="0.401cm" svg:x="19.622cm" svg:y="8.93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0.41cm" svg:height="0.401cm" svg:x="2.532cm" svg:y="9.701cm">
          <draw:text-box>
            <text:p text:style-name="P4"><text:span text:style-name="T1">1</text:span><text:span text:style-name="T1"> </text:span></text:p>
          </draw:text-box>
        </draw:frame>
        <draw:frame draw:style-name="gr14" draw:text-style-name="P10" draw:layer="layout" svg:width="1.89cm" svg:height="0.401cm" svg:x="3.361cm" svg:y="9.842cm">
          <draw:text-box>
            <text:p text:style-name="P4"><text:span text:style-name="T1"><text:s text:c="2"/>{{roll_1}} </text:span></text:p>
          </draw:text-box>
        </draw:frame>
        <draw:frame draw:style-name="gr15" draw:text-style-name="P16" draw:layer="layout" svg:width="2.703cm" svg:height="0.424cm" svg:x="5.795cm" svg:y="9.842cm">
          <draw:text-box>
            <text:p text:style-name="P4"><text:span text:style-name="T12"><text:s text:c="2"/></text:span><text:span text:style-name="T12">{{student_1}</text:span><text:span text:style-name="T12">}</text:span></text:p>
          </draw:text-box>
        </draw:frame>
        <draw:frame draw:style-name="gr4" draw:text-style-name="P5" draw:layer="layout" svg:width="0.369cm" svg:height="0.401cm" svg:x="9.072cm" svg:y="9.536cm">
          <draw:text-box>
            <text:p text:style-name="P4"><text:span text:style-name="T1"><text:s/></text:span></text:p>
          </draw:text-box>
        </draw:frame>
        <draw:frame draw:style-name="gr16" draw:text-style-name="P16" draw:layer="layout" svg:width="2.644cm" svg:height="0.424cm" svg:x="10.668cm" svg:y="9.842cm">
          <draw:text-box>
            <text:p text:style-name="P4"><text:span text:style-name="T12"><text:s text:c="2"/></text:span><text:span text:style-name="T12">{{contact</text:span><text:span text:style-name="T12">_1}}</text:span></text:p>
          </draw:text-box>
        </draw:frame>
        <draw:frame draw:style-name="gr4" draw:text-style-name="P5" draw:layer="layout" svg:width="0.369cm" svg:height="0.401cm" svg:x="13.691cm" svg:y="9.536cm">
          <draw:text-box>
            <text:p text:style-name="P4"><text:span text:style-name="T1"><text:s/></text:span></text:p>
          </draw:text-box>
        </draw:frame>
        <draw:frame draw:style-name="gr17" draw:text-style-name="P10" draw:layer="layout" svg:width="3.122cm" svg:height="0.401cm" svg:x="14.351cm" svg:y="9.576cm">
          <draw:text-box>
            <text:p text:style-name="P4"><text:span text:style-name="T1"><text:s/></text:span><text:span text:style-name="T7"><text:s/></text:span><text:span text:style-name="T13"><text:s/></text:span><text:span text:style-name="T13">G</text:span><text:span text:style-name="T13">u</text:span><text:span text:style-name="T13">i</text:span><text:span text:style-name="T13">d</text:span><text:span text:style-name="T13">e</text:span><text:span text:style-name="T13"> </text:span><text:span text:style-name="T13">N</text:span><text:span text:style-name="T13">a</text:span><text:span text:style-name="T13">m</text:span><text:span text:style-name="T13">e</text:span><text:span text:style-name="T13"> </text:span><text:span text:style-name="T13">:</text:span></text:p>
          </draw:text-box>
        </draw:frame>
        <draw:polygon draw:style-name="gr3" draw:text-style-name="P3" draw:layer="layout" svg:width="18.057cm" svg:height="0.02cm" svg:x="1.887cm" svg:y="9.574cm" svg:viewBox="0 0 18058 21" draw:points="0,0 18058,0 18058,21 0,21">
          <text:p/>
        </draw:polygon>
        <draw:path draw:style-name="gr3" draw:text-style-name="P3" draw:layer="layout" svg:width="18.075cm" svg:height="0.886cm" svg:x="1.887cm" svg:y="9.574cm" svg:viewBox="0 0 18076 887" svg:d="M18058 0h18v17h-18zM0 17h17v870h-17zM1457 17h15v870h-15zM3891 17h17v870h-17zM8765 17h17v870h-17zM12410 17h17v870h-17z">
          <text:p/>
        </draw:path>
        <draw:polygon draw:style-name="gr3" draw:text-style-name="P3" draw:layer="layout" svg:width="0.021cm" svg:height="0.869cm" svg:x="19.941cm" svg:y="9.591cm" svg:viewBox="0 0 22 870" draw:points="0,0 22,0 22,870 0,870">
          <text:p/>
        </draw:polygon>
        <draw:frame draw:style-name="gr18" draw:text-style-name="P7" draw:layer="layout" svg:width="0.421cm" svg:height="0.424cm" svg:x="16.434cm" svg:y="9.537cm">
          <draw:text-box>
            <text:p text:style-name="P4"><text:span text:style-name="T14"><text:s/></text:span></text:p>
          </draw:text-box>
        </draw:frame>
        <draw:frame draw:style-name="gr4" draw:text-style-name="P5" draw:layer="layout" svg:width="0.369cm" svg:height="0.401cm" svg:x="16.54cm" svg:y="9.53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3.084cm" svg:height="0.401cm" svg:x="14.412cm" svg:y="10.071cm">
          <draw:text-box>
            <text:p text:style-name="P4"><text:span text:style-name="T1"><text:s text:c="2"/></text:span><text:span text:style-name="T1">{{</text:span><text:span text:style-name="T1">g</text:span><text:span text:style-name="T1">u</text:span><text:span text:style-name="T1">i</text:span><text:span text:style-name="T1">d</text:span><text:span text:style-name="T1">e</text:span><text:span text:style-name="T1">_</text:span><text:span text:style-name="T1">n</text:span><text:span text:style-name="T1">a</text:span><text:span text:style-name="T1">m</text:span><text:span text:style-name="T1">e</text:span><text:span text:style-name="T1">}} </text:span></text:p>
          </draw:text-box>
        </draw:frame>
        <draw:frame draw:style-name="gr4" draw:text-style-name="P5" draw:layer="layout" svg:width="0.41cm" svg:height="0.401cm" svg:x="2.532cm" svg:y="10.594cm">
          <draw:text-box>
            <text:p text:style-name="P4"><text:span text:style-name="T1">2</text:span><text:span text:style-name="T1"> </text:span></text:p>
          </draw:text-box>
        </draw:frame>
        <draw:frame draw:style-name="gr19" draw:text-style-name="P10" draw:layer="layout" svg:width="1.89cm" svg:height="0.401cm" svg:x="3.353cm" svg:y="10.516cm">
          <draw:text-box>
            <text:p text:style-name="P4"><text:span text:style-name="T1"><text:s text:c="2"/></text:span><text:span text:style-name="T1">{</text:span><text:span text:style-name="T1">{</text:span><text:span text:style-name="T1">r</text:span><text:span text:style-name="T1">o</text:span><text:span text:style-name="T1">l</text:span><text:span text:style-name="T1">l</text:span><text:span text:style-name="T1">_</text:span><text:span text:style-name="T1">2</text:span><text:span text:style-name="T1">}</text:span><text:span text:style-name="T1">}</text:span><text:span text:style-name="T1"> </text:span></text:p>
          </draw:text-box>
        </draw:frame>
        <draw:frame draw:style-name="gr20" draw:text-style-name="P16" draw:layer="layout" svg:width="2.703cm" svg:height="0.424cm" svg:x="5.791cm" svg:y="10.516cm">
          <draw:text-box>
            <text:p text:style-name="P4"><text:span text:style-name="T12"><text:s text:c="2"/></text:span><text:span text:style-name="T12">{</text:span><text:span text:style-name="T12">{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_</text:span><text:span text:style-name="T12">2</text:span><text:span text:style-name="T12">}</text:span><text:span text:style-name="T12">}</text:span></text:p>
          </draw:text-box>
        </draw:frame>
        <draw:frame draw:style-name="gr4" draw:text-style-name="P5" draw:layer="layout" svg:width="0.369cm" svg:height="0.401cm" svg:x="9.072cm" svg:y="10.425cm">
          <draw:text-box>
            <text:p text:style-name="P4"><text:span text:style-name="T1"><text:s/></text:span></text:p>
          </draw:text-box>
        </draw:frame>
        <draw:frame draw:style-name="gr21" draw:text-style-name="P16" draw:layer="layout" svg:width="2.644cm" svg:height="0.424cm" svg:x="10.668cm" svg:y="10.516cm">
          <draw:text-box>
            <text:p text:style-name="P4"><text:span text:style-name="T12"><text:s text:c="2"/></text:span><text:span text:style-name="T12">{{co</text:span><text:span text:style-name="T12">nta</text:span><text:span text:style-name="T12">ct_2</text:span><text:span text:style-name="T12">}}</text:span></text:p>
          </draw:text-box>
        </draw:frame>
        <draw:frame draw:style-name="gr4" draw:text-style-name="P5" draw:layer="layout" svg:width="0.369cm" svg:height="0.401cm" svg:x="13.691cm" svg:y="10.425cm">
          <draw:text-box>
            <text:p text:style-name="P4"><text:span text:style-name="T1"><text:s/></text:span></text:p>
          </draw:text-box>
        </draw:frame>
        <draw:polygon draw:style-name="gr3" draw:text-style-name="P3" draw:layer="layout" svg:width="18.057cm" svg:height="0.017cm" svg:x="1.887cm" svg:y="10.46cm" svg:viewBox="0 0 18058 18" draw:points="0,0 18058,0 18058,18 0,18">
          <text:p/>
        </draw:polygon>
        <draw:path draw:style-name="gr3" draw:text-style-name="P3" draw:layer="layout" svg:width="18.075cm" svg:height="0.785cm" svg:x="1.887cm" svg:y="10.46cm" svg:viewBox="0 0 18076 786" svg:d="M18058 0h18v17h-18zM0 17h17v769h-17zM1457 17h15v769h-15zM3891 17h17v769h-17zM8765 17h17v769h-17zM12410 17h17v769h-17z">
          <text:p/>
        </draw:path>
        <draw:polygon draw:style-name="gr3" draw:text-style-name="P3" draw:layer="layout" svg:width="0.021cm" svg:height="0.768cm" svg:x="19.941cm" svg:y="10.477cm" svg:viewBox="0 0 22 769" draw:points="0,0 22,0 22,769 0,769">
          <text:p/>
        </draw:polygon>
        <draw:frame draw:style-name="gr22" draw:text-style-name="P10" draw:layer="layout" svg:width="3.795cm" svg:height="0.501cm" svg:x="14.295cm" svg:y="11.561cm">
          <draw:text-box>
            <text:p text:style-name="P4"><text:span text:style-name="T1"><text:s text:c="4"/></text:span><text:span text:style-name="T1">{{mentor_name}} </text:span></text:p>
          </draw:text-box>
        </draw:frame>
        <draw:frame draw:style-name="gr23" draw:text-style-name="P10" draw:layer="layout" svg:width="3.542cm" svg:height="0.401cm" svg:x="14.287cm" svg:y="12.065cm">
          <draw:text-box>
            <text:p text:style-name="P4"><text:span text:style-name="T1"><text:s text:c="2"/></text:span><text:span text:style-name="T1"><text:s text:c="2"/></text:span><text:span text:style-name="T1">{</text:span><text:span text:style-name="T1">{</text:span><text:span text:style-name="T1">m</text:span><text:span text:style-name="T1">e</text:span><text:span text:style-name="T1">n</text:span><text:span text:style-name="T1">t</text:span><text:span text:style-name="T1">o</text:span><text:span text:style-name="T1">r</text:span><text:span text:style-name="T1">_</text:span><text:span text:style-name="T1">e</text:span><text:span text:style-name="T1">m</text:span><text:span text:style-name="T1">a</text:span><text:span text:style-name="T1">i</text:span><text:span text:style-name="T1">l</text:span><text:span text:style-name="T1">}</text:span><text:span text:style-name="T1">}</text:span><text:span text:style-name="T1"> </text:span></text:p>
          </draw:text-box>
        </draw:frame>
        <draw:frame draw:style-name="gr24" draw:text-style-name="P10" draw:layer="layout" svg:width="4.103cm" svg:height="0.401cm" svg:x="14.287cm" svg:y="12.7cm">
          <draw:text-box>
            <text:p text:style-name="P4"><text:span text:style-name="T1"><text:s text:c="2"/></text:span><text:span text:style-name="T1"><text:s text:c="2"/></text:span><text:span text:style-name="T1">{</text:span><text:span text:style-name="T1">{</text:span><text:span text:style-name="T1">m</text:span><text:span text:style-name="T1">e</text:span><text:span text:style-name="T1">n</text:span><text:span text:style-name="T1">t</text:span><text:span text:style-name="T1">o</text:span><text:span text:style-name="T1">r</text:span><text:span text:style-name="T1">_</text:span><text:span text:style-name="T1">m</text:span><text:span text:style-name="T1">o</text:span><text:span text:style-name="T1">b</text:span><text:span text:style-name="T1">i</text:span><text:span text:style-name="T1">l</text:span><text:span text:style-name="T1">e</text:span><text:span text:style-name="T1">}</text:span><text:span text:style-name="T1">}</text:span><text:span text:style-name="T1"> </text:span></text:p>
          </draw:text-box>
        </draw:frame>
        <draw:frame draw:style-name="gr7" draw:text-style-name="P7" draw:layer="layout" svg:width="0.428cm" svg:height="0.424cm" svg:x="2.523cm" svg:y="11.37cm">
          <draw:text-box>
            <text:p text:style-name="P4"><text:span text:style-name="T12">3 </text:span></text:p>
          </draw:text-box>
        </draw:frame>
        <draw:polygon draw:style-name="gr3" draw:text-style-name="P3" draw:layer="layout" svg:width="12.409cm" svg:height="0.018cm" svg:x="1.887cm" svg:y="11.242cm" svg:viewBox="0 0 12410 19" draw:points="0,0 12410,0 12410,19 0,19">
          <text:p/>
        </draw:polygon>
        <draw:path draw:style-name="gr3" draw:text-style-name="P3" draw:layer="layout" svg:width="18.075cm" svg:height="0.78cm" svg:x="1.887cm" svg:y="11.242cm" svg:viewBox="0 0 18076 781" svg:d="M12410 0h17v18h-17zM18058 0h18v18h-18zM0 18h17v763h-17zM1457 18h15v763h-15zM3891 18h17v763h-17zM8765 18h17v763h-17z">
          <text:p/>
        </draw:path>
        <draw:path draw:style-name="gr3" draw:text-style-name="P3" draw:layer="layout" svg:width="5.667cm" svg:height="0.762cm" svg:x="14.295cm" svg:y="11.26cm" svg:viewBox="0 0 5668 763" svg:d="M0 0h15v763h-15zM5650 0h18v763h-18z">
          <text:p/>
        </draw:path>
        <draw:frame draw:style-name="gr7" draw:text-style-name="P16" draw:layer="layout" svg:width="1.993cm" svg:height="0.424cm" svg:x="3.353cm" svg:y="11.303cm">
          <draw:text-box>
            <text:p text:style-name="P4"><text:span text:style-name="T12"><text:s/></text:span><text:span text:style-name="T12"><text:s/></text:span><text:span text:style-name="T12">{</text:span><text:span text:style-name="T12">{</text:span><text:span text:style-name="T12">r</text:span><text:span text:style-name="T12">o</text:span><text:span text:style-name="T12">l</text:span><text:span text:style-name="T12">l</text:span><text:span text:style-name="T12">_</text:span><text:span text:style-name="T12">3</text:span><text:span text:style-name="T12">}</text:span><text:span text:style-name="T12">}</text:span><text:span text:style-name="T12"> </text:span></text:p>
          </draw:text-box>
        </draw:frame>
        <draw:frame draw:style-name="gr7" draw:text-style-name="P16" draw:layer="layout" svg:width="2.804cm" svg:height="0.424cm" svg:x="5.791cm" svg:y="11.303cm">
          <draw:text-box>
            <text:p text:style-name="P4"><text:span text:style-name="T12"><text:s text:c="2"/></text:span><text:span text:style-name="T12">{{stude</text:span><text:span text:style-name="T12">nt_3}} </text:span></text:p>
          </draw:text-box>
        </draw:frame>
        <draw:frame draw:style-name="gr7" draw:text-style-name="P16" draw:layer="layout" svg:width="2.745cm" svg:height="0.424cm" svg:x="10.668cm" svg:y="11.303cm">
          <draw:text-box>
            <text:p text:style-name="P4"><text:span text:style-name="T12"><text:s text:c="2"/></text:span><text:span text:style-name="T12">{{</text:span><text:span text:style-name="T12">c</text:span><text:span text:style-name="T12">o</text:span><text:span text:style-name="T12">n</text:span><text:span text:style-name="T12">t</text:span><text:span text:style-name="T12">a</text:span><text:span text:style-name="T12">c</text:span><text:span text:style-name="T12">t</text:span><text:span text:style-name="T12">_</text:span><text:span text:style-name="T12">3</text:span><text:span text:style-name="T12">}} </text:span></text:p>
          </draw:text-box>
        </draw:frame>
        <draw:frame draw:style-name="gr7" draw:text-style-name="P7" draw:layer="layout" svg:width="0.428cm" svg:height="0.424cm" svg:x="2.523cm" svg:y="12.153cm">
          <draw:text-box>
            <text:p text:style-name="P4"><text:span text:style-name="T12">4 </text:span></text:p>
          </draw:text-box>
        </draw:frame>
        <draw:polygon draw:style-name="gr3" draw:text-style-name="P3" draw:layer="layout" svg:width="12.409cm" svg:height="0.017cm" svg:x="1.887cm" svg:y="12.022cm" svg:viewBox="0 0 12410 18" draw:points="0,0 12410,0 12410,18 0,18">
          <text:p/>
        </draw:polygon>
        <draw:path draw:style-name="gr3" draw:text-style-name="P3" draw:layer="layout" svg:width="18.075cm" svg:height="0.785cm" svg:x="1.887cm" svg:y="12.022cm" svg:viewBox="0 0 18076 786" svg:d="M12410 0h17v17h-17zM18058 0h18v17h-18zM0 17h17v769h-17zM1457 17h15v769h-15zM3891 17h17v769h-17zM8765 17h17v769h-17z">
          <text:p/>
        </draw:path>
        <draw:path draw:style-name="gr3" draw:text-style-name="P3" draw:layer="layout" svg:width="5.667cm" svg:height="0.768cm" svg:x="14.295cm" svg:y="12.039cm" svg:viewBox="0 0 5668 769" svg:d="M0 0h15v769h-15zM5650 0h18v769h-18z">
          <text:p/>
        </draw:path>
        <draw:frame draw:style-name="gr7" draw:text-style-name="P16" draw:layer="layout" svg:width="1.993cm" svg:height="0.424cm" svg:x="3.353cm" svg:y="12.09cm">
          <draw:text-box>
            <text:p text:style-name="P4"><text:span text:style-name="T12"><text:s text:c="2"/>{{roll_4}} </text:span></text:p>
          </draw:text-box>
        </draw:frame>
        <draw:frame draw:style-name="gr7" draw:text-style-name="P16" draw:layer="layout" svg:width="2.804cm" svg:height="0.424cm" svg:x="5.791cm" svg:y="12.09cm">
          <draw:text-box>
            <text:p text:style-name="P4"><text:span text:style-name="T12"><text:s text:c="2"/></text:span><text:span text:style-name="T12">{</text:span><text:span text:style-name="T12">{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_</text:span><text:span text:style-name="T12">4</text:span><text:span text:style-name="T12">}</text:span><text:span text:style-name="T12">}</text:span><text:span text:style-name="T12"> </text:span></text:p>
          </draw:text-box>
        </draw:frame>
        <draw:frame draw:style-name="gr7" draw:text-style-name="P16" draw:layer="layout" svg:width="2.745cm" svg:height="0.424cm" svg:x="10.668cm" svg:y="12.09cm">
          <draw:text-box>
            <text:p text:style-name="P4"><text:span text:style-name="T12"><text:s text:c="2"/></text:span><text:span text:style-name="T12">{{contact</text:span><text:span text:style-name="T12">_4}} </text:span></text:p>
          </draw:text-box>
        </draw:frame>
        <draw:frame draw:style-name="gr7" draw:text-style-name="P7" draw:layer="layout" svg:width="0.428cm" svg:height="0.424cm" svg:x="2.523cm" svg:y="12.937cm">
          <draw:text-box>
            <text:p text:style-name="P4"><text:span text:style-name="T12">5 </text:span></text:p>
          </draw:text-box>
        </draw:frame>
        <draw:polygon draw:style-name="gr3" draw:text-style-name="P3" draw:layer="layout" svg:width="12.409cm" svg:height="0.02cm" svg:x="1.887cm" svg:y="12.804cm" svg:viewBox="0 0 12410 21" draw:points="0,0 12410,0 12410,21 0,21">
          <text:p/>
        </draw:polygon>
        <draw:path draw:style-name="gr3" draw:text-style-name="P3" draw:layer="layout" svg:width="5.667cm" svg:height="0.02cm" svg:x="14.295cm" svg:y="12.804cm" svg:viewBox="0 0 5668 21" svg:d="M0 0h15v21h-15zM5650 0h18v21h-18z">
          <text:p/>
        </draw:path>
        <draw:polygon draw:style-name="gr3" draw:text-style-name="P3" draw:layer="layout" svg:width="0.017cm" svg:height="0.785cm" svg:x="1.887cm" svg:y="12.821cm" svg:viewBox="0 0 18 786" draw:points="0,0 18,0 18,786 0,786">
          <text:p/>
        </draw:polygon>
        <draw:polygon draw:style-name="gr3" draw:text-style-name="P3" draw:layer="layout" svg:width="1.458cm" svg:height="0.018cm" svg:x="1.887cm" svg:y="13.588cm" svg:viewBox="0 0 1459 19" draw:points="0,0 1459,0 1459,19 0,19">
          <text:p/>
        </draw:polygon>
        <draw:polygon draw:style-name="gr3" draw:text-style-name="P3" draw:layer="layout" svg:width="0.018cm" svg:height="0.785cm" svg:x="3.344cm" svg:y="12.821cm" svg:viewBox="0 0 19 786" draw:points="0,0 19,0 19,786 0,786">
          <text:p/>
        </draw:polygon>
        <draw:polygon draw:style-name="gr3" draw:text-style-name="P3" draw:layer="layout" svg:width="2.419cm" svg:height="0.018cm" svg:x="3.359cm" svg:y="13.588cm" svg:viewBox="0 0 2420 19" draw:points="0,0 2420,0 2420,19 0,19">
          <text:p/>
        </draw:polygon>
        <draw:polygon draw:style-name="gr3" draw:text-style-name="P3" draw:layer="layout" svg:width="0.017cm" svg:height="0.785cm" svg:x="5.778cm" svg:y="12.821cm" svg:viewBox="0 0 18 786" draw:points="0,0 18,0 18,786 0,786">
          <text:p/>
        </draw:polygon>
        <draw:polygon draw:style-name="gr3" draw:text-style-name="P3" draw:layer="layout" svg:width="4.856cm" svg:height="0.018cm" svg:x="5.795cm" svg:y="13.588cm" svg:viewBox="0 0 4857 19" draw:points="0,0 4857,0 4857,19 0,19">
          <text:p/>
        </draw:polygon>
        <draw:polygon draw:style-name="gr3" draw:text-style-name="P3" draw:layer="layout" svg:width="0.02cm" svg:height="0.785cm" svg:x="10.65cm" svg:y="12.821cm" svg:viewBox="0 0 21 786" draw:points="0,0 21,0 21,786 0,786">
          <text:p/>
        </draw:polygon>
        <draw:polygon draw:style-name="gr3" draw:text-style-name="P3" draw:layer="layout" svg:width="3.631cm" svg:height="0.018cm" svg:x="10.668cm" svg:y="13.588cm" svg:viewBox="0 0 3632 19" draw:points="0,0 3632,0 3632,19 0,19">
          <text:p/>
        </draw:polygon>
        <draw:polygon draw:style-name="gr3" draw:text-style-name="P3" draw:layer="layout" svg:width="0.018cm" svg:height="0.785cm" svg:x="14.295cm" svg:y="12.821cm" svg:viewBox="0 0 19 786" draw:points="0,0 19,0 19,786 0,786">
          <text:p/>
        </draw:polygon>
        <draw:polygon draw:style-name="gr3" draw:text-style-name="P3" draw:layer="layout" svg:width="5.634cm" svg:height="0.018cm" svg:x="14.31cm" svg:y="13.588cm" svg:viewBox="0 0 5635 19" draw:points="0,0 5635,0 5635,19 0,19">
          <text:p/>
        </draw:polygon>
        <draw:polygon draw:style-name="gr3" draw:text-style-name="P3" draw:layer="layout" svg:width="0.021cm" svg:height="0.785cm" svg:x="19.941cm" svg:y="12.821cm" svg:viewBox="0 0 22 786" draw:points="0,0 22,0 22,786 0,786">
          <text:p/>
        </draw:polygon>
        <draw:polygon draw:style-name="gr3" draw:text-style-name="P3" draw:layer="layout" svg:width="0.021cm" svg:height="0.018cm" svg:x="19.941cm" svg:y="13.588cm" svg:viewBox="0 0 22 19" draw:points="0,0 22,0 22,19 0,19">
          <text:p/>
        </draw:polygon>
        <draw:frame draw:style-name="gr7" draw:text-style-name="P16" draw:layer="layout" svg:width="1.993cm" svg:height="0.424cm" svg:x="3.353cm" svg:y="12.878cm">
          <draw:text-box>
            <text:p text:style-name="P4"><text:span text:style-name="T12"><text:s text:c="2"/>{{roll_5}} </text:span></text:p>
          </draw:text-box>
        </draw:frame>
        <draw:frame draw:style-name="gr7" draw:text-style-name="P16" draw:layer="layout" svg:width="2.804cm" svg:height="0.424cm" svg:x="5.791cm" svg:y="12.878cm">
          <draw:text-box>
            <text:p text:style-name="P4"><text:span text:style-name="T12"><text:s/></text:span><text:span text:style-name="T12"><text:s/></text:span><text:span text:style-name="T12">{</text:span><text:span text:style-name="T12">{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_</text:span><text:span text:style-name="T12">5</text:span><text:span text:style-name="T12">}</text:span><text:span text:style-name="T12">}</text:span><text:span text:style-name="T12"> </text:span></text:p>
          </draw:text-box>
        </draw:frame>
        <draw:polygon draw:style-name="gr25" draw:text-style-name="P17" draw:layer="layout" svg:width="18.34cm" svg:height="0.814cm" svg:x="1.896cm" svg:y="14.146cm" svg:viewBox="0 0 18341 815" draw:points="0,0 18341,0 18341,815 0,815">
          <text:p/>
        </draw:polygon>
        <draw:frame draw:style-name="gr7" draw:text-style-name="P16" draw:layer="layout" svg:width="2.745cm" svg:height="0.424cm" svg:x="10.668cm" svg:y="12.878cm">
          <draw:text-box>
            <text:p text:style-name="P4"><text:span text:style-name="T12"><text:s text:c="2"/></text:span><text:span text:style-name="T12">{{co</text:span><text:span text:style-name="T12">ntact</text:span><text:span text:style-name="T12">_5}} </text:span></text:p>
          </draw:text-box>
        </draw:frame>
        <draw:frame draw:style-name="gr26" draw:text-style-name="P18" draw:layer="layout" svg:width="16.572cm" svg:height="0.462cm" svg:x="1.905cm" svg:y="13.665cm">
          <draw:text-box>
            <text:p text:style-name="P4"><text:span text:style-name="T15"><text:s text:c="3"/>REVIEW – <text:s/></text:span><text:span text:style-name="T15"><text:s/>REVIEW – II </text:span><text:span text:style-name="T15">CHECKLIST </text:span><text:span text:style-name="T15">: DESIGN <text:s text:c="5"/></text:span><text:span text:style-name="T15"><text:s text:c="22"/></text:span><text:span text:style-name="T15"><text:s text:c="22"/></text:span><text:span text:style-name="T15"><text:s text:c="2"/>25 Marks</text:span></text:p>
          </draw:text-box>
        </draw:frame>
        <draw:polygon draw:style-name="gr3" draw:text-style-name="P3" draw:layer="layout" svg:width="18.361cm" svg:height="0.02cm" svg:x="1.875cm" svg:y="14.129cm" svg:viewBox="0 0 18362 21" draw:points="0,0 18362,0 18362,21 0,21">
          <text:p/>
        </draw:polygon>
        <draw:path draw:style-name="gr3" draw:text-style-name="P3" draw:layer="layout" svg:width="18.378cm" svg:height="0.831cm" svg:x="1.875cm" svg:y="14.129cm" svg:viewBox="0 0 18379 832" svg:d="M18362 0h17v17h-17zM0 17h15v815h-15z">
          <text:p/>
        </draw:path>
        <draw:polygon draw:style-name="gr3" draw:text-style-name="P3" draw:layer="layout" svg:width="0.018cm" svg:height="0.814cm" svg:x="20.235cm" svg:y="14.146cm" svg:viewBox="0 0 19 815" draw:points="0,0 19,0 19,815 0,815">
          <text:p/>
        </draw:polygon>
        <draw:frame draw:style-name="gr9" draw:text-style-name="P9" draw:layer="layout" svg:width="0.422cm" svg:height="0.462cm" svg:x="19.668cm" svg:y="13.553cm">
          <draw:text-box>
            <text:p text:style-name="P4"><text:span text:style-name="T6"><text:s/></text:span></text:p>
          </draw:text-box>
        </draw:frame>
        <draw:frame draw:style-name="gr4" draw:text-style-name="P5" draw:layer="layout" svg:width="1.644cm" svg:height="0.401cm" svg:x="1.892cm" svg:y="14.348cm">
          <draw:text-box>
            <text:p text:style-name="P4"><text:span text:style-name="T1"><text:s text:c="2"/></text:span><text:span text:style-name="T1">DESI</text:span><text:span text:style-name="T1">GN</text:span></text:p>
          </draw:text-box>
        </draw:frame>
        <draw:frame draw:style-name="gr7" draw:text-style-name="P7" draw:layer="layout" svg:width="0.387cm" svg:height="0.424cm" svg:x="3.34cm" svg:y="14.283cm">
          <draw:text-box>
            <text:p text:style-name="P4"><text:span text:style-name="T12"><text:s/></text:span></text:p>
          </draw:text-box>
        </draw:frame>
        <draw:frame draw:style-name="gr7" draw:text-style-name="P7" draw:layer="layout" svg:width="0.387cm" svg:height="0.424cm" svg:x="1.892cm" svg:y="15.024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17cm" svg:x="1.875cm" svg:y="14.96cm" svg:viewBox="0 0 18362 18" draw:points="0,0 18362,0 18362,18 0,18">
          <text:p/>
        </draw:polygon>
        <draw:path draw:style-name="gr3" draw:text-style-name="P3" draw:layer="layout" svg:width="18.378cm" svg:height="0.687cm" svg:x="1.875cm" svg:y="14.96cm" svg:viewBox="0 0 18379 688" svg:d="M18362 0h17v17h-17zM0 17h15v671h-15zM14826 17h17v671h-17z">
          <text:p/>
        </draw:path>
        <draw:polygon draw:style-name="gr3" draw:text-style-name="P3" draw:layer="layout" svg:width="0.018cm" svg:height="0.67cm" svg:x="20.235cm" svg:y="14.977cm" svg:viewBox="0 0 19 671" draw:points="0,0 19,0 19,671 0,671">
          <text:p/>
        </draw:polygon>
        <draw:frame draw:style-name="gr4" draw:text-style-name="P5" draw:layer="layout" svg:width="10.23cm" svg:height="0.401cm" svg:x="1.993cm" svg:y="15.043cm">
          <draw:text-box>
            <text:p text:style-name="P4"><text:span text:style-name="T1">1. <text:s text:c="2"/>Are requirements reflected in the system architecture? </text:span></text:p>
          </draw:text-box>
        </draw:frame>
        <draw:frame draw:style-name="gr4" draw:text-style-name="P10" draw:layer="layout" svg:width="2.772cm" svg:height="0.401cm" svg:x="16.713cm" svg:y="15.037cm">
          <draw:text-box>
            <text:p text:style-name="P4"><text:span text:style-name="T1"><text:s text:c="10"/></text:span><text:span text:style-name="T1">{{2.1.1id}}</text:span></text:p>
          </draw:text-box>
        </draw:frame>
        <draw:frame draw:style-name="gr7" draw:text-style-name="P7" draw:layer="layout" svg:width="0.387cm" svg:height="0.424cm" svg:x="19.401cm" svg:y="14.918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18cm" svg:x="1.875cm" svg:y="15.646cm" svg:viewBox="0 0 18362 19" draw:points="0,0 18362,0 18362,19 0,19">
          <text:p/>
        </draw:polygon>
        <draw:path draw:style-name="gr3" draw:text-style-name="P3" draw:layer="layout" svg:width="18.378cm" svg:height="0.688cm" svg:x="1.875cm" svg:y="15.646cm" svg:viewBox="0 0 18379 689" svg:d="M18362 0h17v17h-17zM0 17h15v672h-15zM14826 17h17v672h-17z">
          <text:p/>
        </draw:path>
        <draw:polygon draw:style-name="gr3" draw:text-style-name="P3" draw:layer="layout" svg:width="0.018cm" svg:height="0.671cm" svg:x="20.235cm" svg:y="15.663cm" svg:viewBox="0 0 19 672" draw:points="0,0 19,0 19,672 0,672">
          <text:p/>
        </draw:polygon>
        <draw:frame draw:style-name="gr4" draw:text-style-name="P5" draw:layer="layout" svg:width="12.295cm" svg:height="0.401cm" svg:x="1.892cm" svg:y="15.708cm">
          <draw:text-box>
            <text:p text:style-name="P4"><text:span text:style-name="T1"><text:s/>2. <text:s text:c="2"/>Does the design support both project (product) and project goals? </text:span></text:p>
          </draw:text-box>
        </draw:frame>
        <draw:frame draw:style-name="gr4" draw:text-style-name="P10" draw:layer="layout" svg:width="2.772cm" svg:height="0.401cm" svg:x="16.713cm" svg:y="15.723cm">
          <draw:text-box>
            <text:p text:style-name="P4"><text:span text:style-name="T1"><text:s text:c="10"/></text:span><text:span text:style-name="T1">{{2.1.2id}}</text:span></text:p>
          </draw:text-box>
        </draw:frame>
        <draw:frame draw:style-name="gr7" draw:text-style-name="P7" draw:layer="layout" svg:width="0.387cm" svg:height="0.424cm" svg:x="19.401cm" svg:y="15.612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2cm" svg:x="1.875cm" svg:y="16.331cm" svg:viewBox="0 0 18362 21" draw:points="0,0 18362,0 18362,21 0,21">
          <text:p/>
        </draw:polygon>
        <draw:path draw:style-name="gr3" draw:text-style-name="P3" draw:layer="layout" svg:width="18.378cm" svg:height="0.693cm" svg:x="1.875cm" svg:y="16.331cm" svg:viewBox="0 0 18379 694" svg:d="M18362 0h17v17h-17zM0 17h15v677h-15zM14826 17h17v677h-17z">
          <text:p/>
        </draw:path>
        <draw:polygon draw:style-name="gr3" draw:text-style-name="P3" draw:layer="layout" svg:width="0.018cm" svg:height="0.676cm" svg:x="20.235cm" svg:y="16.348cm" svg:viewBox="0 0 19 677" draw:points="0,0 19,0 19,677 0,677">
          <text:p/>
        </draw:polygon>
        <draw:frame draw:style-name="gr4" draw:text-style-name="P5" draw:layer="layout" svg:width="11.687cm" svg:height="0.401cm" svg:x="1.892cm" svg:y="16.393cm">
          <draw:text-box>
            <text:p text:style-name="P4"><text:span text:style-name="T1"><text:s/></text:span><text:span text:style-name="T1">3</text:span><text:span text:style-name="T1">.</text:span><text:span text:style-name="T1"> </text:span><text:span text:style-name="T1"><text:s/></text:span><text:span text:style-name="T1"><text:s/></text:span><text:span text:style-name="T1">D</text:span><text:span text:style-name="T1">o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s</text:span><text:span text:style-name="T1">s</text:span><text:span text:style-name="T1">u</text:span><text:span text:style-name="T1">e</text:span><text:span text:style-name="T1">s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?</text:span><text:span text:style-name="T1"> </text:span></text:p>
          </draw:text-box>
        </draw:frame>
        <draw:frame draw:style-name="gr4" draw:text-style-name="P10" draw:layer="layout" svg:width="2.772cm" svg:height="0.401cm" svg:x="16.713cm" svg:y="16.408cm">
          <draw:text-box>
            <text:p text:style-name="P4"><text:span text:style-name="T1"><text:s text:c="10"/>{{2.1.3id}}</text:span></text:p>
          </draw:text-box>
        </draw:frame>
        <draw:frame draw:style-name="gr7" draw:text-style-name="P7" draw:layer="layout" svg:width="0.387cm" svg:height="0.424cm" svg:x="19.401cm" svg:y="16.293cm">
          <draw:text-box>
            <text:p text:style-name="P4"><text:span text:style-name="T12"><text:s/></text:span></text:p>
          </draw:text-box>
        </draw:frame>
        <draw:frame draw:style-name="gr7" draw:text-style-name="P7" draw:layer="layout" svg:width="0.387cm" svg:height="0.424cm" svg:x="1.892cm" svg:y="17.077cm">
          <draw:text-box>
            <text:p text:style-name="P4"><text:span text:style-name="T12"><text:s/></text:span></text:p>
          </draw:text-box>
        </draw:frame>
        <draw:frame draw:style-name="gr4" draw:text-style-name="P5" draw:layer="layout" svg:width="13.785cm" svg:height="0.401cm" svg:x="1.993cm" svg:y="17.096cm">
          <draw:text-box>
            <text:p text:style-name="P4"><text:span text:style-name="T1">4</text:span><text:span text:style-name="T1">.</text:span><text:span text:style-name="T1"> </text:span><text:span text:style-name="T1"><text:s/></text:span><text:span text:style-name="T1"><text:s/></text:span><text:span text:style-name="T1">I</text:span><text:span text:style-name="T1">s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m</text:span><text:span text:style-name="T1">o</text:span><text:span text:style-name="T1">d</text:span><text:span text:style-name="T1">u</text:span><text:span text:style-name="T1">l</text:span><text:span text:style-name="T1">a</text:span><text:span text:style-name="T1">r</text:span><text:span text:style-name="T1">i</text:span><text:span text:style-name="T1">t</text:span><text:span text:style-name="T1">y</text:span><text:span text:style-name="T1"> </text:span><text:span text:style-name="T1">a</text:span><text:span text:style-name="T1">c</text:span><text:span text:style-name="T1">h</text:span><text:span text:style-name="T1">i</text:span><text:span text:style-name="T1">e</text:span><text:span text:style-name="T1">v</text:span><text:span text:style-name="T1">e</text:span><text:span text:style-name="T1">d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o</text:span><text:span text:style-name="T1">d</text:span><text:span text:style-name="T1">u</text:span><text:span text:style-name="T1">l</text:span><text:span text:style-name="T1">e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l</text:span><text:span text:style-name="T1">y</text:span><text:span text:style-name="T1"> </text:span><text:span text:style-name="T1">i</text:span><text:span text:style-name="T1">n</text:span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</text:span><text:span text:style-name="T1">?</text:span></text:p>
          </draw:text-box>
        </draw:frame>
        <draw:polygon draw:style-name="gr3" draw:text-style-name="P3" draw:layer="layout" svg:width="18.361cm" svg:height="0.014cm" svg:x="1.875cm" svg:y="17.021cm" svg:viewBox="0 0 18362 15" draw:points="0,0 18362,0 18362,15 0,15">
          <text:p/>
        </draw:polygon>
        <draw:path draw:style-name="gr3" draw:text-style-name="P3" draw:layer="layout" svg:width="18.378cm" svg:height="0.684cm" svg:x="1.875cm" svg:y="17.021cm" svg:viewBox="0 0 18379 685" svg:d="M18362 0h17v13h-17zM0 13h15v672h-15zM14826 13h17v672h-17z">
          <text:p/>
        </draw:path>
        <draw:polygon draw:style-name="gr3" draw:text-style-name="P3" draw:layer="layout" svg:width="0.018cm" svg:height="0.671cm" svg:x="20.235cm" svg:y="17.034cm" svg:viewBox="0 0 19 672" draw:points="0,0 19,0 19,672 0,672">
          <text:p/>
        </draw:polygon>
        <draw:frame draw:style-name="gr7" draw:text-style-name="P7" draw:layer="layout" svg:width="0.387cm" svg:height="0.424cm" svg:x="15.674cm" svg:y="17.077cm">
          <draw:text-box>
            <text:p text:style-name="P4"><text:span text:style-name="T12"><text:s/></text:span></text:p>
          </draw:text-box>
        </draw:frame>
        <draw:frame draw:style-name="gr4" draw:text-style-name="P10" draw:layer="layout" svg:width="2.772cm" svg:height="0.401cm" svg:x="16.713cm" svg:y="17.094cm">
          <draw:text-box>
            <text:p text:style-name="P4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{</text:span><text:span text:style-name="T1">{</text:span><text:span text:style-name="T1">2</text:span><text:span text:style-name="T1">.</text:span><text:span text:style-name="T1">1</text:span><text:span text:style-name="T1">.</text:span><text:span text:style-name="T1">4</text:span><text:span text:style-name="T1">i</text:span><text:span text:style-name="T1">d</text:span><text:span text:style-name="T1">}</text:span><text:span text:style-name="T1">}</text:span></text:p>
          </draw:text-box>
        </draw:frame>
        <draw:frame draw:style-name="gr7" draw:text-style-name="P7" draw:layer="layout" svg:width="0.387cm" svg:height="0.424cm" svg:x="19.401cm" svg:y="16.979cm">
          <draw:text-box>
            <text:p text:style-name="P4"><text:span text:style-name="T12"><text:s/></text:span></text:p>
          </draw:text-box>
        </draw:frame>
        <draw:frame draw:style-name="gr7" draw:text-style-name="P7" draw:layer="layout" svg:width="0.387cm" svg:height="0.424cm" svg:x="1.892cm" svg:y="17.767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2cm" svg:x="1.875cm" svg:y="17.702cm" svg:viewBox="0 0 18362 21" draw:points="0,0 18362,0 18362,21 0,21">
          <text:p/>
        </draw:polygon>
        <draw:path draw:style-name="gr3" draw:text-style-name="P3" draw:layer="layout" svg:width="18.378cm" svg:height="0.687cm" svg:x="1.875cm" svg:y="17.702cm" svg:viewBox="0 0 18379 688" svg:d="M18362 0h17v17h-17zM0 17h15v671h-15zM14826 17h17v671h-17z">
          <text:p/>
        </draw:path>
        <draw:polygon draw:style-name="gr3" draw:text-style-name="P3" draw:layer="layout" svg:width="0.018cm" svg:height="0.67cm" svg:x="20.235cm" svg:y="17.719cm" svg:viewBox="0 0 19 671" draw:points="0,0 19,0 19,671 0,671">
          <text:p/>
        </draw:polygon>
        <draw:frame draw:style-name="gr4" draw:text-style-name="P5" draw:layer="layout" svg:width="13.465cm" svg:height="0.401cm" svg:x="1.993cm" svg:y="17.786cm">
          <draw:text-box>
            <text:p text:style-name="P4"><text:span text:style-name="T1">5. <text:s text:c="2"/>Are structural </text:span><text:span text:style-name="T1">diagrams (Class, </text:span><text:span text:style-name="T1">Object, etc.) well </text:span><text:span text:style-name="T1">defined and </text:span><text:span text:style-name="T1">understood? </text:span></text:p>
          </draw:text-box>
        </draw:frame>
        <draw:frame draw:style-name="gr4" draw:text-style-name="P10" draw:layer="layout" svg:width="2.772cm" svg:height="0.401cm" svg:x="16.713cm" svg:y="17.78cm">
          <draw:text-box>
            <text:p text:style-name="P4"><text:span text:style-name="T1"><text:s text:c="10"/>{{2.1.5id}}</text:span></text:p>
          </draw:text-box>
        </draw:frame>
        <draw:frame draw:style-name="gr7" draw:text-style-name="P7" draw:layer="layout" svg:width="0.387cm" svg:height="0.424cm" svg:x="19.401cm" svg:y="17.668cm">
          <draw:text-box>
            <text:p text:style-name="P4"><text:span text:style-name="T12"><text:s/></text:span></text:p>
          </draw:text-box>
        </draw:frame>
        <draw:frame draw:style-name="gr4" draw:text-style-name="P5" draw:layer="layout" svg:width="14.877cm" svg:height="0.401cm" svg:x="1.892cm" svg:y="18.442cm">
          <draw:text-box>
            <text:p text:style-name="P4"><text:span text:style-name="T1"><text:s/>6. <text:s/>Are all class </text:span><text:span text:style-name="T1">associations clearly </text:span><text:span text:style-name="T1">defined and understood? </text:span><text:span text:style-name="T1">(Is it clear which classes </text:span></text:p>
          </draw:text-box>
        </draw:frame>
        <draw:polygon draw:style-name="gr3" draw:text-style-name="P3" draw:layer="layout" svg:width="18.361cm" svg:height="0.017cm" svg:x="1.875cm" svg:y="18.389cm" svg:viewBox="0 0 18362 18" draw:points="0,0 18362,0 18362,18 0,18">
          <text:p/>
        </draw:polygon>
        <draw:path draw:style-name="gr3" draw:text-style-name="P3" draw:layer="layout" svg:width="18.378cm" svg:height="1.149cm" svg:x="1.875cm" svg:y="18.389cm" svg:viewBox="0 0 18379 1150" svg:d="M18362 0h17v17h-17zM0 17h15v1133h-15zM14826 17h17v1133h-17z">
          <text:p/>
        </draw:path>
        <draw:polygon draw:style-name="gr3" draw:text-style-name="P3" draw:layer="layout" svg:width="0.018cm" svg:height="1.132cm" svg:x="20.235cm" svg:y="18.406cm" svg:viewBox="0 0 19 1133" draw:points="0,0 19,0 19,1133 0,1133">
          <text:p/>
        </draw:polygon>
        <draw:frame draw:style-name="gr7" draw:text-style-name="P7" draw:layer="layout" svg:width="5.228cm" svg:height="0.424cm" svg:x="1.897cm" svg:y="18.914cm">
          <draw:text-box>
            <text:p text:style-name="P4"><text:span text:style-name="T12"><text:s text:c="6"/></text:span><text:span text:style-name="T12">provid</text:span><text:span text:style-name="T12">e </text:span><text:span text:style-name="T12">which </text:span><text:span text:style-name="T12">servic</text:span><text:span text:style-name="T12">es)? </text:span></text:p>
          </draw:text-box>
        </draw:frame>
        <draw:frame draw:style-name="gr4" draw:text-style-name="P10" draw:layer="layout" svg:width="2.772cm" svg:height="0.401cm" svg:x="16.713cm" svg:y="18.466cm">
          <draw:text-box>
            <text:p text:style-name="P4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{</text:span><text:span text:style-name="T1">{</text:span><text:span text:style-name="T1">2</text:span><text:span text:style-name="T1">.</text:span><text:span text:style-name="T1">1</text:span><text:span text:style-name="T1">.</text:span><text:span text:style-name="T1">6</text:span><text:span text:style-name="T1">i</text:span><text:span text:style-name="T1">d</text:span><text:span text:style-name="T1">}</text:span><text:span text:style-name="T1">}</text:span></text:p>
          </draw:text-box>
        </draw:frame>
        <draw:frame draw:style-name="gr7" draw:text-style-name="P7" draw:layer="layout" svg:width="0.387cm" svg:height="0.424cm" svg:x="19.401cm" svg:y="18.351cm">
          <draw:text-box>
            <text:p text:style-name="P4"><text:span text:style-name="T12"><text:s/></text:span></text:p>
          </draw:text-box>
        </draw:frame>
        <draw:frame draw:style-name="gr4" draw:text-style-name="P5" draw:layer="layout" svg:width="13.052cm" svg:height="0.401cm" svg:x="1.892cm" svg:y="19.525cm">
          <draw:text-box>
            <text:p text:style-name="P4"><text:span text:style-name="T1"><text:s/>7. <text:s text:c="2"/>Are </text:span><text:span text:style-name="T1">the </text:span><text:span text:style-name="T1">classes </text:span><text:span text:style-name="T1">in the </text:span><text:span text:style-name="T1">class </text:span><text:span text:style-name="T1">diagram </text:span><text:span text:style-name="T1">clear? </text:span><text:span text:style-name="T1">(What </text:span><text:span text:style-name="T1">they </text:span><text:span text:style-name="T1">represen</text:span><text:span text:style-name="T1">t in the <text:s/></text:span></text:p>
          </draw:text-box>
        </draw:frame>
        <draw:polygon draw:style-name="gr3" draw:text-style-name="P3" draw:layer="layout" svg:width="18.361cm" svg:height="0.02cm" svg:x="1.875cm" svg:y="19.535cm" svg:viewBox="0 0 18362 21" draw:points="0,0 18362,0 18362,21 0,21">
          <text:p/>
        </draw:polygon>
        <draw:path draw:style-name="gr3" draw:text-style-name="P3" draw:layer="layout" svg:width="18.378cm" svg:height="1.019cm" svg:x="1.875cm" svg:y="19.535cm" svg:viewBox="0 0 18379 1020" svg:d="M18362 0h17v17h-17zM0 17h15v1003h-15zM14826 17h17v1003h-17z">
          <text:p/>
        </draw:path>
        <draw:polygon draw:style-name="gr3" draw:text-style-name="P3" draw:layer="layout" svg:width="0.018cm" svg:height="1.002cm" svg:x="20.235cm" svg:y="19.552cm" svg:viewBox="0 0 19 1003" draw:points="0,0 19,0 19,1003 0,1003">
          <text:p/>
        </draw:polygon>
        <draw:frame draw:style-name="gr4" draw:text-style-name="P5" draw:layer="layout" svg:width="6.383cm" svg:height="0.401cm" svg:x="1.897cm" svg:y="19.996cm">
          <draw:text-box>
            <text:p text:style-name="P4"><text:span text:style-name="T1"><text:s text:c="7"/>Architecture design </text:span><text:span text:style-name="T1">document?) </text:span></text:p>
          </draw:text-box>
        </draw:frame>
        <draw:frame draw:style-name="gr4" draw:text-style-name="P10" draw:layer="layout" svg:width="2.772cm" svg:height="0.401cm" svg:x="16.713cm" svg:y="19.609cm">
          <draw:text-box>
            <text:p text:style-name="P4"><text:span text:style-name="T1"><text:s text:c="10"/>{{2.1.7id}}</text:span></text:p>
          </draw:text-box>
        </draw:frame>
        <draw:frame draw:style-name="gr7" draw:text-style-name="P7" draw:layer="layout" svg:width="0.387cm" svg:height="0.424cm" svg:x="19.401cm" svg:y="19.498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2cm" svg:x="1.875cm" svg:y="20.551cm" svg:viewBox="0 0 18362 21" draw:points="0,0 18362,0 18362,21 0,21">
          <text:p/>
        </draw:polygon>
        <draw:path draw:style-name="gr3" draw:text-style-name="P3" draw:layer="layout" svg:width="18.378cm" svg:height="0.684cm" svg:x="1.875cm" svg:y="20.551cm" svg:viewBox="0 0 18379 685" svg:d="M18362 0h17v17h-17zM0 17h15v668h-15zM14826 17h17v668h-17z">
          <text:p/>
        </draw:path>
        <draw:polygon draw:style-name="gr3" draw:text-style-name="P3" draw:layer="layout" svg:width="0.018cm" svg:height="0.667cm" svg:x="20.235cm" svg:y="20.568cm" svg:viewBox="0 0 19 668" draw:points="0,0 19,0 19,668 0,668">
          <text:p/>
        </draw:polygon>
        <draw:frame draw:style-name="gr4" draw:text-style-name="P5" draw:layer="layout" svg:width="6.774cm" svg:height="0.401cm" svg:x="1.892cm" svg:y="20.61cm">
          <draw:text-box>
            <text:p text:style-name="P4"><text:span text:style-name="T1"><text:s/>8. <text:s text:c="2"/>Is inheritance appropriately used? </text:span></text:p>
          </draw:text-box>
        </draw:frame>
        <draw:frame draw:style-name="gr4" draw:text-style-name="P10" draw:layer="layout" svg:width="2.772cm" svg:height="0.401cm" svg:x="16.713cm" svg:y="20.625cm">
          <draw:text-box>
            <text:p text:style-name="P4"><text:span text:style-name="T1"><text:s text:c="10"/>{{2.1.8id}}</text:span></text:p>
          </draw:text-box>
        </draw:frame>
        <draw:frame draw:style-name="gr7" draw:text-style-name="P7" draw:layer="layout" svg:width="0.387cm" svg:height="0.424cm" svg:x="19.401cm" svg:y="20.514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18cm" svg:x="1.875cm" svg:y="21.234cm" svg:viewBox="0 0 18362 19" draw:points="0,0 18362,0 18362,19 0,19">
          <text:p/>
        </draw:polygon>
        <draw:path draw:style-name="gr3" draw:text-style-name="P3" draw:layer="layout" svg:width="18.378cm" svg:height="0.688cm" svg:x="1.875cm" svg:y="21.234cm" svg:viewBox="0 0 18379 689" svg:d="M18362 0h17v17h-17zM0 17h15v672h-15zM14826 17h17v672h-17z">
          <text:p/>
        </draw:path>
        <draw:polygon draw:style-name="gr3" draw:text-style-name="P3" draw:layer="layout" svg:width="0.018cm" svg:height="0.671cm" svg:x="20.235cm" svg:y="21.251cm" svg:viewBox="0 0 19 672" draw:points="0,0 19,0 19,672 0,672">
          <text:p/>
        </draw:polygon>
        <draw:frame draw:style-name="gr4" draw:text-style-name="P5" draw:layer="layout" svg:width="13.968cm" svg:height="0.401cm" svg:x="1.892cm" svg:y="21.295cm">
          <draw:text-box>
            <text:p text:style-name="P4"><text:span text:style-name="T1"><text:s/>9. <text:s text:c="2"/>Are the multiplicities in the </text:span><text:span text:style-name="T1">use case diagram depicted in </text:span><text:span text:style-name="T1">the class diagram? </text:span></text:p>
          </draw:text-box>
        </draw:frame>
        <draw:frame draw:style-name="gr4" draw:text-style-name="P10" draw:layer="layout" svg:width="2.772cm" svg:height="0.401cm" svg:x="16.713cm" svg:y="21.311cm">
          <draw:text-box>
            <text:p text:style-name="P4"><text:span text:style-name="T1"><text:s text:c="10"/>{{2.1.9id}}</text:span></text:p>
          </draw:text-box>
        </draw:frame>
        <draw:frame draw:style-name="gr7" draw:text-style-name="P7" draw:layer="layout" svg:width="0.387cm" svg:height="0.424cm" svg:x="19.401cm" svg:y="21.2cm">
          <draw:text-box>
            <text:p text:style-name="P4"><text:span text:style-name="T12"><text:s/></text:span></text:p>
          </draw:text-box>
        </draw:frame>
        <draw:frame draw:style-name="gr4" draw:text-style-name="P5" draw:layer="layout" svg:width="13.976cm" svg:height="0.401cm" svg:x="1.892cm" svg:y="21.938cm">
          <draw:text-box>
            <text:p text:style-name="P4"><text:span text:style-name="T1"><text:s/></text:span><text:span text:style-name="T1">1</text:span><text:span text:style-name="T1">0</text:span><text:span text:style-name="T1">.</text:span><text:span text:style-name="T1"> </text:span><text:span text:style-name="T1">A</text:span><text:span text:style-name="T1">r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a</text:span><text:span text:style-name="T1">l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text:span text:style-name="T1">s</text:span><text:span text:style-name="T1"> </text:span><text:span text:style-name="T1">(</text:span><text:span text:style-name="T1">u</text:span><text:span text:style-name="T1">s</text:span><text:span text:style-name="T1">e</text:span><text:span text:style-name="T1"> </text:span><text:span text:style-name="T1">c</text:span><text:span text:style-name="T1">a</text:span><text:span text:style-name="T1">s</text:span><text:span text:style-name="T1">e</text:span><text:span text:style-name="T1">,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,</text:span><text:span text:style-name="T1"> </text:span><text:span text:style-name="T1">a</text:span><text:span text:style-name="T1">c</text:span><text:span text:style-name="T1">t</text:span><text:span text:style-name="T1">i</text:span><text:span text:style-name="T1">v</text:span><text:span text:style-name="T1">i</text:span><text:span text:style-name="T1">t</text:span><text:span text:style-name="T1">y</text:span><text:span text:style-name="T1">,</text:span><text:span text:style-name="T1"> </text:span><text:span text:style-name="T1">e</text:span><text:span text:style-name="T1">t</text:span><text:span text:style-name="T1">c</text:span><text:span text:style-name="T1">.</text:span><text:span text:style-name="T1">)</text:span><text:span text:style-name="T1"> </text:span><text:span text:style-name="T1">w</text:span><text:span text:style-name="T1">e</text:span><text:span text:style-name="T1">l</text:span><text:span text:style-name="T1">l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d</text:span><text:span text:style-name="T1"> </text:span><text:span text:style-name="T1">a</text:span><text:span text:style-name="T1">n</text:span><text:span text:style-name="T1">d</text:span><text:span text:style-name="T1"> </text:span></text:p>
          </draw:text-box>
        </draw:frame>
        <draw:polygon draw:style-name="gr3" draw:text-style-name="P3" draw:layer="layout" svg:width="18.361cm" svg:height="0.02cm" svg:x="1.875cm" svg:y="21.919cm" svg:viewBox="0 0 18362 21" draw:points="0,0 18362,0 18362,21 0,21">
          <text:p/>
        </draw:polygon>
        <draw:path draw:style-name="gr3" draw:text-style-name="P3" draw:layer="layout" svg:width="18.378cm" svg:height="1.076cm" svg:x="1.875cm" svg:y="21.919cm" svg:viewBox="0 0 18379 1077" svg:d="M18362 0h17v17h-17zM0 17h15v1060h-15zM14826 17h17v1060h-17z">
          <text:p/>
        </draw:path>
        <draw:polygon draw:style-name="gr3" draw:text-style-name="P3" draw:layer="layout" svg:width="0.018cm" svg:height="1.269cm" svg:x="20.235cm" svg:y="21.907cm" svg:viewBox="0 0 19 1270" draw:points="0,0 19,0 19,1270 0,1270">
          <text:p/>
        </draw:polygon>
        <draw:frame draw:style-name="gr4" draw:text-style-name="P5" draw:layer="layout" svg:width="3.053cm" svg:height="0.401cm" svg:x="1.897cm" svg:y="22.413cm">
          <draw:text-box>
            <text:p text:style-name="P4"><text:span text:style-name="T1"><text:s text:c="7"/>understood? </text:span></text:p>
          </draw:text-box>
        </draw:frame>
        <draw:frame draw:style-name="gr27" draw:text-style-name="P10" draw:layer="layout" svg:width="2.983cm" svg:height="0.401cm" svg:x="16.713cm" svg:y="21.973cm">
          <draw:text-box>
            <text:p text:style-name="P4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{</text:span><text:span text:style-name="T1">{</text:span><text:span text:style-name="T1">2</text:span><text:span text:style-name="T1">.</text:span><text:span text:style-name="T1">1</text:span><text:span text:style-name="T1">.</text:span><text:span text:style-name="T1">1</text:span><text:span text:style-name="T1">0</text:span><text:span text:style-name="T1">i</text:span><text:span text:style-name="T1">d</text:span><text:span text:style-name="T1">}</text:span><text:span text:style-name="T1">}</text:span></text:p>
          </draw:text-box>
        </draw:frame>
        <draw:frame draw:style-name="gr28" draw:text-style-name="P16" draw:layer="layout" svg:width="0.387cm" svg:height="0.424cm" svg:x="19.613cm" svg:y="21.971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18cm" svg:x="1.875cm" svg:y="22.995cm" svg:viewBox="0 0 18362 19" draw:points="0,0 18362,0 18362,19 0,19">
          <text:p/>
        </draw:polygon>
        <draw:path draw:style-name="gr3" draw:text-style-name="P3" draw:layer="layout" svg:width="18.378cm" svg:height="0.682cm" svg:x="1.875cm" svg:y="22.995cm" svg:viewBox="0 0 18379 683" svg:d="M18362 0h17v17h-17zM0 17h15v666h-15zM14826 17h17v666h-17z">
          <text:p/>
        </draw:path>
        <draw:polygon draw:style-name="gr3" draw:text-style-name="P3" draw:layer="layout" svg:width="0.018cm" svg:height="0.71cm" svg:x="20.235cm" svg:y="23.101cm" svg:viewBox="0 0 19 711" draw:points="0,0 19,0 19,711 0,711">
          <text:p/>
        </draw:polygon>
        <draw:frame draw:style-name="gr4" draw:text-style-name="P5" draw:layer="layout" svg:width="12.916cm" svg:height="0.401cm" svg:x="1.892cm" svg:y="23.052cm">
          <draw:text-box>
            <text:p text:style-name="P4"><text:span text:style-name="T1"><text:s/>11. Is aggregation/containment (if used) clearly defined and understood? </text:span></text:p>
          </draw:text-box>
        </draw:frame>
        <draw:frame draw:style-name="gr27" draw:text-style-name="P10" draw:layer="layout" svg:width="2.983cm" svg:height="0.401cm" svg:x="16.713cm" svg:y="23.044cm">
          <draw:text-box>
            <text:p text:style-name="P4"><text:span text:style-name="T1"><text:s text:c="10"/>{{2.1.11id}}</text:span></text:p>
          </draw:text-box>
        </draw:frame>
        <draw:frame draw:style-name="gr28" draw:text-style-name="P16" draw:layer="layout" svg:width="0.387cm" svg:height="0.424cm" svg:x="19.613cm" svg:y="23.042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17cm" svg:x="1.875cm" svg:y="23.677cm" svg:viewBox="0 0 18362 18" draw:points="0,0 18362,0 18362,18 0,18">
          <text:p/>
        </draw:polygon>
        <draw:path draw:style-name="gr3" draw:text-style-name="P3" draw:layer="layout" svg:width="18.378cm" svg:height="0.687cm" svg:x="1.875cm" svg:y="23.677cm" svg:viewBox="0 0 18379 688" svg:d="M18362 0h17v16h-17zM0 16h15v672h-15zM14826 16h17v672h-17z">
          <text:p/>
        </draw:path>
        <draw:polygon draw:style-name="gr3" draw:text-style-name="P3" draw:layer="layout" svg:width="0.018cm" svg:height="0.664cm" svg:x="20.235cm" svg:y="23.782cm" svg:viewBox="0 0 19 665" draw:points="0,0 19,0 19,665 0,665">
          <text:p/>
        </draw:polygon>
        <draw:frame draw:style-name="gr4" draw:text-style-name="P5" draw:layer="layout" svg:width="11.513cm" svg:height="0.401cm" svg:x="1.892cm" svg:y="23.738cm">
          <draw:text-box>
            <text:p text:style-name="P4"><text:span text:style-name="T1"><text:s/>12. Does each case have clearly defined actors and input/output? </text:span></text:p>
          </draw:text-box>
        </draw:frame>
        <draw:frame draw:style-name="gr27" draw:text-style-name="P10" draw:layer="layout" svg:width="2.983cm" svg:height="0.401cm" svg:x="16.713cm" svg:y="23.734cm">
          <draw:text-box>
            <text:p text:style-name="P4"><text:span text:style-name="T1"><text:s text:c="10"/>{{2.1.12id}}</text:span></text:p>
          </draw:text-box>
        </draw:frame>
        <draw:frame draw:style-name="gr28" draw:text-style-name="P16" draw:layer="layout" svg:width="0.387cm" svg:height="0.424cm" svg:x="19.613cm" svg:y="23.732cm">
          <draw:text-box>
            <text:p text:style-name="P4"><text:span text:style-name="T12"><text:s/></text:span></text:p>
          </draw:text-box>
        </draw:frame>
        <draw:frame draw:style-name="gr4" draw:text-style-name="P5" draw:layer="layout" svg:width="12.882cm" svg:height="0.401cm" svg:x="1.892cm" svg:y="24.406cm">
          <draw:text-box>
            <text:p text:style-name="P4"><text:span text:style-name="T1"><text:s/>13. Is all concurrent processing (if used) clearly understood and reflected </text:span></text:p>
          </draw:text-box>
        </draw:frame>
        <draw:polygon draw:style-name="gr3" draw:text-style-name="P3" draw:layer="layout" svg:width="18.361cm" svg:height="0.02cm" svg:x="1.875cm" svg:y="24.361cm" svg:viewBox="0 0 18362 21" draw:points="0,0 18362,0 18362,21 0,21">
          <text:p/>
        </draw:polygon>
        <draw:path draw:style-name="gr3" draw:text-style-name="P3" draw:layer="layout" svg:width="18.378cm" svg:height="1.134cm" svg:x="1.875cm" svg:y="24.361cm" svg:viewBox="0 0 18379 1135" svg:d="M18362 0h17v17h-17zM0 17h15v1118h-15zM14826 17h17v1118h-17z">
          <text:p/>
        </draw:path>
        <draw:polygon draw:style-name="gr3" draw:text-style-name="P3" draw:layer="layout" svg:width="0.018cm" svg:height="1.269cm" svg:x="20.235cm" svg:y="24.447cm" svg:viewBox="0 0 19 1270" draw:points="0,0 19,0 19,1270 0,1270">
          <text:p/>
        </draw:polygon>
        <draw:frame draw:style-name="gr4" draw:text-style-name="P5" draw:layer="layout" svg:width="5.5cm" svg:height="0.401cm" svg:x="1.897cm" svg:y="24.881cm">
          <draw:text-box>
            <text:p text:style-name="P4"><text:span text:style-name="T1"><text:s text:c="7"/>in the sequence diagrams? </text:span></text:p>
          </draw:text-box>
        </draw:frame>
        <draw:frame draw:style-name="gr27" draw:text-style-name="P10" draw:layer="layout" svg:width="2.983cm" svg:height="0.401cm" svg:x="16.713cm" svg:y="24.42cm">
          <draw:text-box>
            <text:p text:style-name="P4"><text:span text:style-name="T1"><text:s text:c="10"/>{{2.1.13id}}</text:span></text:p>
          </draw:text-box>
        </draw:frame>
        <draw:frame draw:style-name="gr28" draw:text-style-name="P16" draw:layer="layout" svg:width="0.387cm" svg:height="0.424cm" svg:x="19.613cm" svg:y="24.413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18cm" svg:x="1.875cm" svg:y="25.492cm" svg:viewBox="0 0 18362 19" draw:points="0,0 18362,0 18362,19 0,19">
          <text:p/>
        </draw:polygon>
        <draw:path draw:style-name="gr3" draw:text-style-name="P3" draw:layer="layout" svg:width="18.378cm" svg:height="0.687cm" svg:x="1.875cm" svg:y="25.492cm" svg:viewBox="0 0 18379 688" svg:d="M18362 0h17v18h-17zM0 18h15v670h-15zM14826 18h17v670h-17z">
          <text:p/>
        </draw:path>
        <draw:polygon draw:style-name="gr3" draw:text-style-name="P3" draw:layer="layout" svg:width="0.018cm" svg:height="0.752cm" svg:x="20.235cm" svg:y="25.599cm" svg:viewBox="0 0 19 753" draw:points="0,0 19,0 19,753 0,753">
          <text:p/>
        </draw:polygon>
        <draw:frame draw:style-name="gr4" draw:text-style-name="P5" draw:layer="layout" svg:width="8.152cm" svg:height="0.401cm" svg:x="1.892cm" svg:y="25.549cm">
          <draw:text-box>
            <text:p text:style-name="P4"><text:span text:style-name="T1"><text:s/>14. Are all objects used in sequence diagram? </text:span></text:p>
          </draw:text-box>
        </draw:frame>
        <draw:frame draw:style-name="gr27" draw:text-style-name="P10" draw:layer="layout" svg:width="2.983cm" svg:height="0.401cm" svg:x="16.713cm" svg:y="25.546cm">
          <draw:text-box>
            <text:p text:style-name="P4"><text:span text:style-name="T1"><text:s text:c="10"/>{{2.1.14id}}</text:span></text:p>
          </draw:text-box>
        </draw:frame>
        <draw:frame draw:style-name="gr28" draw:text-style-name="P16" draw:layer="layout" svg:width="0.387cm" svg:height="0.424cm" svg:x="19.613cm" svg:y="25.544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18cm" svg:x="1.875cm" svg:y="26.178cm" svg:viewBox="0 0 18362 19" draw:points="0,0 18362,0 18362,19 0,19">
          <text:p/>
        </draw:polygon>
        <draw:path draw:style-name="gr3" draw:text-style-name="P3" draw:layer="layout" svg:width="18.378cm" svg:height="0.688cm" svg:x="1.875cm" svg:y="26.178cm" svg:viewBox="0 0 18379 689" svg:d="M18362 0h17v16h-17zM0 16h15v673h-15zM14826 16h17v673h-17z">
          <text:p/>
        </draw:path>
        <draw:polygon draw:style-name="gr3" draw:text-style-name="P3" draw:layer="layout" svg:width="0.018cm" svg:height="0.672cm" svg:x="20.235cm" svg:y="26.283cm" svg:viewBox="0 0 19 673" draw:points="0,0 19,0 19,673 0,673">
          <text:p/>
        </draw:polygon>
        <draw:frame draw:style-name="gr4" draw:text-style-name="P5" draw:layer="layout" svg:width="9.583cm" svg:height="0.401cm" svg:x="1.892cm" svg:y="26.236cm">
          <draw:text-box>
            <text:p text:style-name="P4"><text:span text:style-name="T1"><text:s/>15. Does the sequence diagram match class diagram? </text:span></text:p>
          </draw:text-box>
        </draw:frame>
        <draw:frame draw:style-name="gr27" draw:text-style-name="P10" draw:layer="layout" svg:width="2.983cm" svg:height="0.401cm" svg:x="16.713cm" svg:y="26.232cm">
          <draw:text-box>
            <text:p text:style-name="P4"><text:span text:style-name="T1"><text:s text:c="10"/>{{2.1.15id}}</text:span></text:p>
          </draw:text-box>
        </draw:frame>
        <draw:frame draw:style-name="gr28" draw:text-style-name="P16" draw:layer="layout" svg:width="0.387cm" svg:height="0.424cm" svg:x="19.613cm" svg:y="26.229cm">
          <draw:text-box>
            <text:p text:style-name="P4"><text:span text:style-name="T12"><text:s/></text:span></text:p>
          </draw:text-box>
        </draw:frame>
        <draw:polygon draw:style-name="gr3" draw:text-style-name="P3" draw:layer="layout" svg:width="18.361cm" svg:height="0.018cm" svg:x="1.875cm" svg:y="26.863cm" svg:viewBox="0 0 18362 19" draw:points="0,0 18362,0 18362,19 0,19">
          <text:p/>
        </draw:polygon>
        <draw:polygon draw:style-name="gr3" draw:text-style-name="P3" draw:layer="layout" svg:width="0.018cm" svg:height="0.018cm" svg:x="20.235cm" svg:y="26.952cm" svg:viewBox="0 0 19 19" draw:points="0,0 19,0 19,19 0,19">
          <text:p/>
        </draw:polygon>
        <draw:polygon draw:style-name="gr3" draw:text-style-name="P3" draw:layer="layout" svg:width="0.018cm" svg:height="0.684cm" svg:x="1.875cm" svg:y="26.881cm" svg:viewBox="0 0 19 685" draw:points="0,0 19,0 19,685 0,685">
          <text:p/>
        </draw:polygon>
        <draw:polygon draw:style-name="gr3" draw:text-style-name="P3" draw:layer="layout" svg:width="14.825cm" svg:height="0.021cm" svg:x="1.875cm" svg:y="27.544cm" svg:viewBox="0 0 14826 22" draw:points="0,0 14826,0 14826,22 0,22">
          <text:p/>
        </draw:polygon>
        <draw:polygon draw:style-name="gr3" draw:text-style-name="P3" draw:layer="layout" svg:width="0.017cm" svg:height="0.684cm" svg:x="16.7cm" svg:y="26.881cm" svg:viewBox="0 0 18 685" draw:points="0,0 18,0 18,685 0,685">
          <text:p/>
        </draw:polygon>
        <draw:polygon draw:style-name="gr3" draw:text-style-name="P3" draw:layer="layout" svg:width="3.519cm" svg:height="0.021cm" svg:x="16.717cm" svg:y="27.544cm" svg:viewBox="0 0 3520 22" draw:points="0,0 3520,0 3520,22 0,22">
          <text:p/>
        </draw:polygon>
        <draw:polygon draw:style-name="gr3" draw:text-style-name="P3" draw:layer="layout" svg:width="0.018cm" svg:height="0.684cm" svg:x="20.235cm" svg:y="26.881cm" svg:viewBox="0 0 19 685" draw:points="0,0 19,0 19,685 0,685">
          <text:p/>
        </draw:polygon>
        <draw:polygon draw:style-name="gr3" draw:text-style-name="P3" draw:layer="layout" svg:width="0.018cm" svg:height="0.021cm" svg:x="20.235cm" svg:y="27.544cm" svg:viewBox="0 0 19 22" draw:points="0,0 19,0 19,22 0,22">
          <text:p/>
        </draw:polygon>
        <draw:frame draw:style-name="gr2" draw:text-style-name="P2" draw:layer="layout" svg:width="1.237cm" svg:height="1.58cm" svg:x="2.853cm" svg:y="2.724cm">
          <draw:image xlink:href="Pictures/10000000000000400000005266EC1E1E.jpg" xlink:type="simple" xlink:show="embed" xlink:actuate="onLoad" draw:mime-type="image/jpeg">
            <text:p/>
          </draw:image>
        </draw:frame>
        <draw:frame draw:style-name="gr4" draw:text-style-name="P5" draw:layer="layout" svg:width="12.688cm" svg:height="0.401cm" svg:x="1.892cm" svg:y="26.926cm">
          <draw:text-box>
            <text:p text:style-name="P4"><text:span text:style-name="T1"><text:s/>16. Are the symbols used in all diagrams correspond to UML standards? </text:span></text:p>
          </draw:text-box>
        </draw:frame>
        <draw:frame draw:style-name="gr27" draw:text-style-name="P10" draw:layer="layout" svg:width="2.983cm" svg:height="0.401cm" svg:x="16.713cm" svg:y="26.918cm">
          <draw:text-box>
            <text:p text:style-name="P4"><text:span text:style-name="T1"><text:s text:c="10"/>{{2.1.16id}}</text:span></text:p>
          </draw:text-box>
        </draw:frame>
        <draw:frame draw:style-name="gr28" draw:text-style-name="P16" draw:layer="layout" svg:width="0.387cm" svg:height="0.424cm" svg:x="19.613cm" svg:y="26.915cm">
          <draw:text-box>
            <text:p text:style-name="P4"><text:span text:style-name="T12"><text:s/></text:span></text:p>
          </draw:text-box>
        </draw:frame>
        <draw:frame draw:style-name="gr29" draw:text-style-name="P20" draw:layer="layout" svg:width="5.322cm" svg:height="0.933cm" svg:x="14.605cm" svg:y="10.555cm">
          <draw:text-box>
            <text:p text:style-name="P19"><text:span text:style-name="T10"><text:s/>Mentor Name, email </text:span></text:p>
            <text:p text:style-name="P19"><text:span text:style-name="T10">&amp; Mobile No. :</text:span><text:span text:style-name="T12">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polygon draw:style-name="gr30" draw:text-style-name="P21" draw:layer="layout" svg:width="19.847cm" svg:height="0.557cm" svg:x="0.579cm" svg:y="6.734cm" svg:viewBox="0 0 19848 558" draw:points="0,0 19848,0 19848,558 0,558">
          <text:p/>
        </draw:polygon>
        <draw:frame draw:style-name="gr31" draw:text-style-name="P22" draw:layer="layout" svg:width="0.412cm" svg:height="0.455cm" svg:x="18.521cm" svg:y="2.675cm">
          <draw:text-box>
            <text:p text:style-name="P4"><text:span text:style-name="T16"><text:s/></text:span></text:p>
          </draw:text-box>
        </draw:frame>
        <draw:polygon draw:style-name="gr3" draw:text-style-name="P3" draw:layer="layout" svg:width="19.869cm" svg:height="0.021cm" svg:x="0.557cm" svg:y="6.716cm" svg:viewBox="0 0 19870 22" draw:points="0,0 19870,0 19870,22 0,22">
          <text:p/>
        </draw:polygon>
        <draw:path draw:style-name="gr3" draw:text-style-name="P3" draw:layer="layout" svg:width="19.887cm" svg:height="0.575cm" svg:x="0.557cm" svg:y="6.716cm" svg:viewBox="0 0 19888 576" svg:d="M19870 0h18v18h-18zM0 18h17v558h-17z">
          <text:p/>
        </draw:path>
        <draw:polygon draw:style-name="gr3" draw:text-style-name="P3" draw:layer="layout" svg:width="0.021cm" svg:height="0.557cm" svg:x="20.423cm" svg:y="6.734cm" svg:viewBox="0 0 22 558" draw:points="0,0 22,0 22,558 0,558">
          <text:p/>
        </draw:polygon>
        <draw:frame draw:style-name="gr31" draw:text-style-name="P22" draw:layer="layout" svg:width="7.689cm" svg:height="0.455cm" svg:x="6.697cm" svg:y="6.201cm">
          <draw:text-box>
            <text:p text:style-name="P4"><text:span text:style-name="T16">STUDENT PERFORMANCE EVALUATION</text:span></text:p>
          </draw:text-box>
        </draw:frame>
        <draw:frame draw:style-name="gr31" draw:text-style-name="P22" draw:layer="layout" svg:width="0.412cm" svg:height="0.455cm" svg:x="14.893cm" svg:y="6.192cm">
          <draw:text-box>
            <text:p text:style-name="P4"><text:span text:style-name="T16"><text:s/></text:span></text:p>
          </draw:text-box>
        </draw:frame>
        <draw:frame draw:style-name="gr31" draw:text-style-name="P22" draw:layer="layout" svg:width="8.301cm" svg:height="0.455cm" svg:x="0.576cm" svg:y="6.739cm">
          <draw:text-box>
            <text:p text:style-name="P4"><text:span text:style-name="T16"><text:s text:c="2"/>Student’s Contribution and Performance </text:span></text:p>
          </draw:text-box>
        </draw:frame>
        <draw:frame draw:style-name="gr31" draw:text-style-name="P22" draw:layer="layout" svg:width="0.412cm" svg:height="0.455cm" svg:x="0.576cm" svg:y="7.272cm">
          <draw:text-box>
            <text:p text:style-name="P4"><text:span text:style-name="T16"><text:s/></text:span></text:p>
          </draw:text-box>
        </draw:frame>
        <draw:frame draw:style-name="gr31" draw:text-style-name="P22" draw:layer="layout" svg:width="0.412cm" svg:height="0.455cm" svg:x="0.576cm" svg:y="7.745cm">
          <draw:text-box>
            <text:p text:style-name="P4"><text:span text:style-name="T16"><text:s/></text:span></text:p>
          </draw:text-box>
        </draw:frame>
        <draw:polygon draw:style-name="gr3" draw:text-style-name="P3" draw:layer="layout" svg:width="19.869cm" svg:height="0.02cm" svg:x="0.557cm" svg:y="7.288cm" svg:viewBox="0 0 19870 21" draw:points="0,0 19870,0 19870,21 0,21">
          <text:p/>
        </draw:polygon>
        <draw:path draw:style-name="gr3" draw:text-style-name="P3" draw:layer="layout" svg:width="19.887cm" svg:height="0.574cm" svg:x="0.557cm" svg:y="7.288cm" svg:viewBox="0 0 19888 575" svg:d="M19870 0h18v17h-18zM0 17h17v558h-17zM9984 17h18v558h-18z">
          <text:p/>
        </draw:path>
        <draw:polygon draw:style-name="gr3" draw:text-style-name="P3" draw:layer="layout" svg:width="0.021cm" svg:height="0.557cm" svg:x="20.423cm" svg:y="7.305cm" svg:viewBox="0 0 22 558" draw:points="0,0 22,0 22,558 0,558">
          <text:p/>
        </draw:polygon>
        <draw:frame draw:style-name="gr31" draw:text-style-name="P22" draw:layer="layout" svg:width="2.368cm" svg:height="0.455cm" svg:x="2.455cm" svg:y="8.227cm">
          <draw:text-box>
            <text:p text:style-name="P4"><text:span text:style-name="T17">Particulars</text:span></text:p>
          </draw:text-box>
        </draw:frame>
        <draw:polygon draw:style-name="gr3" draw:text-style-name="P3" draw:layer="layout" svg:width="0.02cm" svg:height="0.021cm" svg:x="0.557cm" svg:y="7.859cm" svg:viewBox="0 0 21 22" draw:points="0,0 21,0 21,22 0,22">
          <text:p/>
        </draw:polygon>
        <draw:polygon draw:style-name="gr3" draw:text-style-name="P3" draw:layer="layout" svg:width="9.886cm" svg:height="0.021cm" svg:x="10.54cm" svg:y="7.859cm" svg:viewBox="0 0 9887 22" draw:points="0,0 9887,0 9887,22 0,22">
          <text:p/>
        </draw:polygon>
        <draw:path draw:style-name="gr3" draw:text-style-name="P3" draw:layer="layout" svg:width="19.887cm" svg:height="0.618cm" svg:x="0.557cm" svg:y="7.859cm" svg:viewBox="0 0 19888 619" svg:d="M19870 0h18v18h-18zM0 18h17v601h-17zM9984 18h18v601h-18z">
          <text:p/>
        </draw:path>
        <draw:polygon draw:style-name="gr3" draw:text-style-name="P3" draw:layer="layout" svg:width="0.021cm" svg:height="0.6cm" svg:x="20.423cm" svg:y="7.877cm" svg:viewBox="0 0 22 601" draw:points="0,0 22,0 22,601 0,601">
          <text:p/>
        </draw:polygon>
        <draw:frame draw:style-name="gr31" draw:text-style-name="P22" draw:layer="layout" svg:width="0.412cm" svg:height="0.455cm" svg:x="4.424cm" svg:y="8.22cm">
          <draw:text-box>
            <text:p text:style-name="P4"><text:span text:style-name="T16"><text:s/></text:span></text:p>
          </draw:text-box>
        </draw:frame>
        <draw:frame draw:style-name="gr31" draw:text-style-name="P22" draw:layer="layout" svg:width="4.993cm" svg:height="0.455cm" svg:x="12.065cm" svg:y="7.315cm">
          <draw:text-box>
            <text:p text:style-name="P4"><text:span text:style-name="T16"><text:s text:c="22"/>Marks (25M) </text:span></text:p>
          </draw:text-box>
        </draw:frame>
        <draw:frame draw:style-name="gr31" draw:text-style-name="P22" draw:layer="layout" svg:width="3.413cm" svg:height="0.455cm" svg:x="14.021cm" svg:y="7.907cm">
          <draw:text-box>
            <text:p text:style-name="P4"><text:span text:style-name="T16">Group Members </text:span></text:p>
          </draw:text-box>
        </draw:frame>
        <draw:frame draw:style-name="gr31" draw:text-style-name="P22" draw:layer="layout" svg:width="0.412cm" svg:height="0.455cm" svg:x="11.1cm" svg:y="8.507cm">
          <draw:text-box>
            <text:p text:style-name="P4"><text:span text:style-name="T16">1</text:span></text:p>
          </draw:text-box>
        </draw:frame>
        <draw:frame draw:style-name="gr31" draw:text-style-name="P22" draw:layer="layout" svg:width="0.412cm" svg:height="0.455cm" svg:x="11.307cm" svg:y="8.5cm">
          <draw:text-box>
            <text:p text:style-name="P4"><text:span text:style-name="T16"><text:s/></text:span></text:p>
          </draw:text-box>
        </draw:frame>
        <draw:frame draw:style-name="gr31" draw:text-style-name="P22" draw:layer="layout" svg:width="0.412cm" svg:height="0.455cm" svg:x="13.047cm" svg:y="8.507cm">
          <draw:text-box>
            <text:p text:style-name="P4"><text:span text:style-name="T16">2</text:span></text:p>
          </draw:text-box>
        </draw:frame>
        <draw:frame draw:style-name="gr31" draw:text-style-name="P22" draw:layer="layout" svg:width="0.412cm" svg:height="0.455cm" svg:x="13.25cm" svg:y="8.5cm">
          <draw:text-box>
            <text:p text:style-name="P4"><text:span text:style-name="T16"><text:s/></text:span></text:p>
          </draw:text-box>
        </draw:frame>
        <draw:frame draw:style-name="gr31" draw:text-style-name="P22" draw:layer="layout" svg:width="0.412cm" svg:height="0.455cm" svg:x="14.99cm" svg:y="8.507cm">
          <draw:text-box>
            <text:p text:style-name="P4"><text:span text:style-name="T16">3</text:span></text:p>
          </draw:text-box>
        </draw:frame>
        <draw:frame draw:style-name="gr31" draw:text-style-name="P22" draw:layer="layout" svg:width="0.412cm" svg:height="0.455cm" svg:x="15.198cm" svg:y="8.5cm">
          <draw:text-box>
            <text:p text:style-name="P4"><text:span text:style-name="T16"><text:s/></text:span></text:p>
          </draw:text-box>
        </draw:frame>
        <draw:polygon draw:style-name="gr3" draw:text-style-name="P3" draw:layer="layout" svg:width="0.02cm" svg:height="0.02cm" svg:x="0.557cm" svg:y="8.474cm" svg:viewBox="0 0 21 21" draw:points="0,0 21,0 21,21 0,21">
          <text:p/>
        </draw:polygon>
        <draw:polygon draw:style-name="gr3" draw:text-style-name="P3" draw:layer="layout" svg:width="9.886cm" svg:height="0.02cm" svg:x="10.54cm" svg:y="8.474cm" svg:viewBox="0 0 9887 21" draw:points="0,0 9887,0 9887,21 0,21">
          <text:p/>
        </draw:polygon>
        <draw:path draw:style-name="gr3" draw:text-style-name="P3" draw:layer="layout" svg:width="19.887cm" svg:height="0.615cm" svg:x="0.557cm" svg:y="8.474cm" svg:viewBox="0 0 19888 616" svg:d="M19870 0h18v18h-18zM0 18h17v598h-17zM9984 18h18v598h-18zM11933 18h17v598h-17zM13879 18h17v598h-17zM15827 18h17v598h-17zM17847 18h17v598h-17z">
          <text:p/>
        </draw:path>
        <draw:polygon draw:style-name="gr3" draw:text-style-name="P3" draw:layer="layout" svg:width="0.021cm" svg:height="0.597cm" svg:x="20.423cm" svg:y="8.492cm" svg:viewBox="0 0 22 598" draw:points="0,0 22,0 22,598 0,598">
          <text:p/>
        </draw:polygon>
        <draw:frame draw:style-name="gr31" draw:text-style-name="P22" draw:layer="layout" svg:width="0.412cm" svg:height="0.455cm" svg:x="16.976cm" svg:y="8.507cm">
          <draw:text-box>
            <text:p text:style-name="P4"><text:span text:style-name="T16">4</text:span></text:p>
          </draw:text-box>
        </draw:frame>
        <draw:frame draw:style-name="gr31" draw:text-style-name="P22" draw:layer="layout" svg:width="0.412cm" svg:height="0.455cm" svg:x="17.183cm" svg:y="8.5cm">
          <draw:text-box>
            <text:p text:style-name="P4"><text:span text:style-name="T16"><text:s/></text:span></text:p>
          </draw:text-box>
        </draw:frame>
        <draw:frame draw:style-name="gr31" draw:text-style-name="P22" draw:layer="layout" svg:width="0.449cm" svg:height="0.455cm" svg:x="18.999cm" svg:y="8.507cm">
          <draw:text-box>
            <text:p text:style-name="P4"><text:span text:style-name="T16">5 </text:span></text:p>
          </draw:text-box>
        </draw:frame>
        <draw:frame draw:style-name="gr4" draw:text-style-name="P5" draw:layer="layout" svg:width="0.369cm" svg:height="0.401cm" svg:x="0.635cm" svg:y="9.167cm">
          <draw:text-box>
            <text:p text:style-name="P4"><text:span text:style-name="T1"><text:s/></text:span></text:p>
          </draw:text-box>
        </draw:frame>
        <draw:frame draw:style-name="gr32" draw:text-style-name="P23" draw:layer="layout" svg:width="9.607cm" svg:height="0.384cm" svg:x="0.731cm" svg:y="9.186cm">
          <draw:text-box>
            <text:p text:style-name="P4"><text:span text:style-name="T13">1. <text:s text:c="2"/>System Architecture &amp; Literature Survey (Review-I)</text:span></text:p>
          </draw:text-box>
        </draw:frame>
        <draw:frame draw:style-name="gr7" draw:text-style-name="P7" draw:layer="layout" svg:width="0.387cm" svg:height="0.424cm" svg:x="10.234cm" svg:y="9.148cm">
          <draw:text-box>
            <text:p text:style-name="P4"><text:span text:style-name="T18"><text:s/></text:span></text:p>
          </draw:text-box>
        </draw:frame>
        <draw:frame draw:style-name="gr31" draw:text-style-name="P24" draw:layer="layout" svg:width="1.777cm" svg:height="0.455cm" svg:x="10.557cm" svg:y="9.169cm">
          <draw:text-box>
            <text:p text:style-name="P4"><text:span text:style-name="T16">{{2.1.1}} </text:span></text:p>
          </draw:text-box>
        </draw:frame>
        <draw:frame draw:style-name="gr31" draw:text-style-name="P24" draw:layer="layout" svg:width="1.777cm" svg:height="0.455cm" svg:x="12.503cm" svg:y="9.169cm">
          <draw:text-box>
            <text:p text:style-name="P4"><text:span text:style-name="T16">{{2.2.1}} </text:span></text:p>
          </draw:text-box>
        </draw:frame>
        <draw:polygon draw:style-name="gr3" draw:text-style-name="P3" draw:layer="layout" svg:width="19.869cm" svg:height="0.018cm" svg:x="0.557cm" svg:y="9.088cm" svg:viewBox="0 0 19870 19" draw:points="0,0 19870,0 19870,19 0,19">
          <text:p/>
        </draw:polygon>
        <draw:path draw:style-name="gr3" draw:text-style-name="P3" draw:layer="layout" svg:width="19.887cm" svg:height="0.682cm" svg:x="0.557cm" svg:y="9.088cm" svg:viewBox="0 0 19888 683" svg:d="M19870 0h18v15h-18zM0 15h17v668h-17zM9984 15h18v668h-18zM11933 15h17v668h-17zM13879 15h17v668h-17zM15827 15h17v668h-17zM17847 15h17v668h-17z">
          <text:p/>
        </draw:path>
        <draw:polygon draw:style-name="gr3" draw:text-style-name="P3" draw:layer="layout" svg:width="0.021cm" svg:height="0.667cm" svg:x="20.423cm" svg:y="9.103cm" svg:viewBox="0 0 22 668" draw:points="0,0 22,0 22,668 0,668">
          <text:p/>
        </draw:polygon>
        <draw:frame draw:style-name="gr31" draw:text-style-name="P24" draw:layer="layout" svg:width="1.777cm" svg:height="0.455cm" svg:x="14.448cm" svg:y="9.169cm">
          <draw:text-box>
            <text:p text:style-name="P4"><text:span text:style-name="T16">{{2.3.1}} </text:span></text:p>
          </draw:text-box>
        </draw:frame>
        <draw:frame draw:style-name="gr31" draw:text-style-name="P24" draw:layer="layout" svg:width="1.777cm" svg:height="0.455cm" svg:x="16.397cm" svg:y="9.169cm">
          <draw:text-box>
            <text:p text:style-name="P4"><text:span text:style-name="T16">{{2.4.1}} </text:span></text:p>
          </draw:text-box>
        </draw:frame>
        <draw:frame draw:style-name="gr31" draw:text-style-name="P24" draw:layer="layout" svg:width="1.777cm" svg:height="0.455cm" svg:x="18.417cm" svg:y="9.169cm">
          <draw:text-box>
            <text:p text:style-name="P4"><text:span text:style-name="T16">{{2.5.1}} </text:span></text:p>
          </draw:text-box>
        </draw:frame>
        <draw:frame draw:style-name="gr4" draw:text-style-name="P5" draw:layer="layout" svg:width="9.922cm" svg:height="0.401cm" svg:x="0.576cm" svg:y="9.883cm">
          <draw:text-box>
            <text:p text:style-name="P4"><text:span text:style-name="T1"><text:s/></text:span><text:span text:style-name="T7">2. <text:s text:c="2"/>Project Design <text:s text:c="57"/>(5 M)</text:span></text:p>
          </draw:text-box>
        </draw:frame>
        <draw:frame draw:style-name="gr31" draw:text-style-name="P24" draw:layer="layout" svg:width="0.412cm" svg:height="0.455cm" svg:x="10.389cm" svg:y="9.949cm">
          <draw:text-box>
            <text:p text:style-name="P4"><text:span text:style-name="T17"><text:s/></text:span></text:p>
          </draw:text-box>
        </draw:frame>
        <draw:frame draw:style-name="gr31" draw:text-style-name="P24" draw:layer="layout" svg:width="1.777cm" svg:height="0.455cm" svg:x="10.557cm" svg:y="9.847cm">
          <draw:text-box>
            <text:p text:style-name="P4"><text:span text:style-name="T16">{{2.1.2}} </text:span></text:p>
          </draw:text-box>
        </draw:frame>
        <draw:frame draw:style-name="gr31" draw:text-style-name="P24" draw:layer="layout" svg:width="1.777cm" svg:height="0.455cm" svg:x="12.503cm" svg:y="9.847cm">
          <draw:text-box>
            <text:p text:style-name="P4"><text:span text:style-name="T16">{{2.2.2}} </text:span></text:p>
          </draw:text-box>
        </draw:frame>
        <draw:polygon draw:style-name="gr3" draw:text-style-name="P3" draw:layer="layout" svg:width="19.869cm" svg:height="0.017cm" svg:x="0.557cm" svg:y="9.77cm" svg:viewBox="0 0 19870 18" draw:points="0,0 19870,0 19870,18 0,18">
          <text:p/>
        </draw:polygon>
        <draw:path draw:style-name="gr3" draw:text-style-name="P3" draw:layer="layout" svg:width="19.887cm" svg:height="0.687cm" svg:x="0.557cm" svg:y="9.77cm" svg:viewBox="0 0 19888 688" svg:d="M19870 0h18v17h-18zM0 17h17v671h-17zM9984 17h18v671h-18zM11933 17h17v671h-17zM13879 17h17v671h-17zM15827 17h17v671h-17zM17847 17h17v671h-17z">
          <text:p/>
        </draw:path>
        <draw:polygon draw:style-name="gr3" draw:text-style-name="P3" draw:layer="layout" svg:width="0.021cm" svg:height="0.67cm" svg:x="20.423cm" svg:y="9.787cm" svg:viewBox="0 0 22 671" draw:points="0,0 22,0 22,671 0,671">
          <text:p/>
        </draw:polygon>
        <draw:frame draw:style-name="gr31" draw:text-style-name="P24" draw:layer="layout" svg:width="1.777cm" svg:height="0.455cm" svg:x="14.448cm" svg:y="9.847cm">
          <draw:text-box>
            <text:p text:style-name="P4"><text:span text:style-name="T16">{{2.3.2}} </text:span></text:p>
          </draw:text-box>
        </draw:frame>
        <draw:frame draw:style-name="gr31" draw:text-style-name="P24" draw:layer="layout" svg:width="1.777cm" svg:height="0.455cm" svg:x="16.397cm" svg:y="9.847cm">
          <draw:text-box>
            <text:p text:style-name="P4"><text:span text:style-name="T16">{{2.4.2}} </text:span></text:p>
          </draw:text-box>
        </draw:frame>
        <draw:frame draw:style-name="gr31" draw:text-style-name="P24" draw:layer="layout" svg:width="1.777cm" svg:height="0.455cm" svg:x="18.417cm" svg:y="9.847cm">
          <draw:text-box>
            <text:p text:style-name="P4"><text:span text:style-name="T16">{{2.5.2}} </text:span></text:p>
          </draw:text-box>
        </draw:frame>
        <draw:frame draw:style-name="gr4" draw:text-style-name="P5" draw:layer="layout" svg:width="0.369cm" svg:height="0.401cm" svg:x="0.576cm" svg:y="10.513cm">
          <draw:text-box>
            <text:p text:style-name="P4"><text:span text:style-name="T1"><text:s/></text:span></text:p>
          </draw:text-box>
        </draw:frame>
        <draw:frame draw:style-name="gr32" draw:text-style-name="P23" draw:layer="layout" svg:width="7.387cm" svg:height="0.384cm" svg:x="0.672cm" svg:y="10.532cm">
          <draw:text-box>
            <text:p text:style-name="P4"><text:span text:style-name="T13">3. <text:s text:c="2"/>Methodology /Algorithms and Project </text:span></text:p>
          </draw:text-box>
        </draw:frame>
        <draw:frame draw:style-name="gr33" draw:text-style-name="P25" draw:layer="layout" svg:width="1.494cm" svg:height="0.347cm" svg:x="7.955cm" svg:y="10.569cm">
          <draw:text-box>
            <text:p text:style-name="P4"><text:span text:style-name="T11">Features</text:span></text:p>
          </draw:text-box>
        </draw:frame>
        <draw:frame draw:style-name="gr32" draw:text-style-name="P23" draw:layer="layout" svg:width="1.24cm" svg:height="0.384cm" svg:x="9.345cm" svg:y="10.532cm">
          <draw:text-box>
            <text:p text:style-name="P4"><text:span text:style-name="T13"><text:s text:c="2"/>(5 M) </text:span></text:p>
          </draw:text-box>
        </draw:frame>
        <draw:frame draw:style-name="gr31" draw:text-style-name="P24" draw:layer="layout" svg:width="1.777cm" svg:height="0.455cm" svg:x="10.557cm" svg:y="10.533cm">
          <draw:text-box>
            <text:p text:style-name="P4"><text:span text:style-name="T16">{{2.1.3}} </text:span></text:p>
          </draw:text-box>
        </draw:frame>
        <draw:frame draw:style-name="gr31" draw:text-style-name="P24" draw:layer="layout" svg:width="1.777cm" svg:height="0.455cm" svg:x="12.503cm" svg:y="10.533cm">
          <draw:text-box>
            <text:p text:style-name="P4"><text:span text:style-name="T16">{{2.2.3}} </text:span></text:p>
          </draw:text-box>
        </draw:frame>
        <draw:polygon draw:style-name="gr3" draw:text-style-name="P3" draw:layer="layout" svg:width="19.869cm" svg:height="0.013cm" svg:x="0.557cm" svg:y="10.456cm" svg:viewBox="0 0 19870 14" draw:points="0,0 19870,0 19870,14 0,14">
          <text:p/>
        </draw:polygon>
        <draw:path draw:style-name="gr3" draw:text-style-name="P3" draw:layer="layout" svg:width="19.887cm" svg:height="0.682cm" svg:x="0.557cm" svg:y="10.456cm" svg:viewBox="0 0 19888 683" svg:d="M19870 0h18v13h-18zM0 13h17v670h-17zM9984 13h18v670h-18zM11933 13h17v670h-17zM13879 13h17v670h-17zM15827 13h17v670h-17zM17847 13h17v670h-17z">
          <text:p/>
        </draw:path>
        <draw:polygon draw:style-name="gr3" draw:text-style-name="P3" draw:layer="layout" svg:width="0.021cm" svg:height="0.669cm" svg:x="20.423cm" svg:y="10.469cm" svg:viewBox="0 0 22 670" draw:points="0,0 22,0 22,670 0,670">
          <text:p/>
        </draw:polygon>
        <draw:frame draw:style-name="gr31" draw:text-style-name="P24" draw:layer="layout" svg:width="1.777cm" svg:height="0.455cm" svg:x="14.448cm" svg:y="10.533cm">
          <draw:text-box>
            <text:p text:style-name="P4"><text:span text:style-name="T16">{{2.3.3}} </text:span></text:p>
          </draw:text-box>
        </draw:frame>
        <draw:frame draw:style-name="gr31" draw:text-style-name="P24" draw:layer="layout" svg:width="1.777cm" svg:height="0.455cm" svg:x="16.397cm" svg:y="10.533cm">
          <draw:text-box>
            <text:p text:style-name="P4"><text:span text:style-name="T16">{{2.4.3}} </text:span></text:p>
          </draw:text-box>
        </draw:frame>
        <draw:frame draw:style-name="gr31" draw:text-style-name="P24" draw:layer="layout" svg:width="1.777cm" svg:height="0.455cm" svg:x="18.417cm" svg:y="10.533cm">
          <draw:text-box>
            <text:p text:style-name="P4"><text:span text:style-name="T16">{{2.5.3}} </text:span></text:p>
          </draw:text-box>
        </draw:frame>
        <draw:frame draw:style-name="gr4" draw:text-style-name="P5" draw:layer="layout" svg:width="10.012cm" svg:height="0.401cm" svg:x="0.576cm" svg:y="11.198cm">
          <draw:text-box>
            <text:p text:style-name="P4"><text:span text:style-name="T1"><text:s/></text:span><text:span text:style-name="T7">4. <text:s text:c="2"/>Project Planning <text:s text:c="53"/>(2 M) </text:span></text:p>
          </draw:text-box>
        </draw:frame>
        <draw:frame draw:style-name="gr31" draw:text-style-name="P24" draw:layer="layout" svg:width="1.777cm" svg:height="0.455cm" svg:x="10.557cm" svg:y="11.219cm">
          <draw:text-box>
            <text:p text:style-name="P4"><text:span text:style-name="T16">{{2.1.4}} </text:span></text:p>
          </draw:text-box>
        </draw:frame>
        <draw:frame draw:style-name="gr31" draw:text-style-name="P24" draw:layer="layout" svg:width="1.777cm" svg:height="0.455cm" svg:x="12.503cm" svg:y="11.219cm">
          <draw:text-box>
            <text:p text:style-name="P4"><text:span text:style-name="T16">{{2.2.4}} </text:span></text:p>
          </draw:text-box>
        </draw:frame>
        <draw:polygon draw:style-name="gr3" draw:text-style-name="P3" draw:layer="layout" svg:width="19.869cm" svg:height="0.021cm" svg:x="0.557cm" svg:y="11.135cm" svg:viewBox="0 0 19870 22" draw:points="0,0 19870,0 19870,22 0,22">
          <text:p/>
        </draw:polygon>
        <draw:path draw:style-name="gr3" draw:text-style-name="P3" draw:layer="layout" svg:width="19.887cm" svg:height="0.684cm" svg:x="0.557cm" svg:y="11.135cm" svg:viewBox="0 0 19888 685" svg:d="M19870 0h18v18h-18zM0 18h17v667h-17zM9984 18h18v667h-18zM11933 18h17v667h-17zM13879 18h17v667h-17zM15827 18h17v667h-17zM17847 18h17v667h-17z">
          <text:p/>
        </draw:path>
        <draw:polygon draw:style-name="gr3" draw:text-style-name="P3" draw:layer="layout" svg:width="0.021cm" svg:height="0.666cm" svg:x="20.423cm" svg:y="11.153cm" svg:viewBox="0 0 22 667" draw:points="0,0 22,0 22,667 0,667">
          <text:p/>
        </draw:polygon>
        <draw:frame draw:style-name="gr31" draw:text-style-name="P24" draw:layer="layout" svg:width="1.777cm" svg:height="0.455cm" svg:x="14.448cm" svg:y="11.219cm">
          <draw:text-box>
            <text:p text:style-name="P4"><text:span text:style-name="T16">{{2.3.4}} </text:span></text:p>
          </draw:text-box>
        </draw:frame>
        <draw:frame draw:style-name="gr31" draw:text-style-name="P24" draw:layer="layout" svg:width="1.777cm" svg:height="0.455cm" svg:x="16.397cm" svg:y="11.219cm">
          <draw:text-box>
            <text:p text:style-name="P4"><text:span text:style-name="T16">{{2.4.4}} </text:span></text:p>
          </draw:text-box>
        </draw:frame>
        <draw:frame draw:style-name="gr31" draw:text-style-name="P24" draw:layer="layout" svg:width="1.777cm" svg:height="0.455cm" svg:x="18.417cm" svg:y="11.219cm">
          <draw:text-box>
            <text:p text:style-name="P4"><text:span text:style-name="T16">{{2.5.4}} </text:span></text:p>
          </draw:text-box>
        </draw:frame>
        <draw:frame draw:style-name="gr4" draw:text-style-name="P5" draw:layer="layout" svg:width="9.967cm" svg:height="0.401cm" svg:x="0.576cm" svg:y="11.876cm">
          <draw:text-box>
            <text:p text:style-name="P4"><text:span text:style-name="T7"><text:s/>5. <text:s text:c="2"/>Basic details of Implementation <text:s text:c="23"/>(5 M) </text:span></text:p>
          </draw:text-box>
        </draw:frame>
        <draw:frame draw:style-name="gr31" draw:text-style-name="P24" draw:layer="layout" svg:width="1.777cm" svg:height="0.455cm" svg:x="10.557cm" svg:y="11.9cm">
          <draw:text-box>
            <text:p text:style-name="P4"><text:span text:style-name="T16">{{2.1.5}} </text:span></text:p>
          </draw:text-box>
        </draw:frame>
        <draw:frame draw:style-name="gr31" draw:text-style-name="P24" draw:layer="layout" svg:width="1.777cm" svg:height="0.455cm" svg:x="12.497cm" svg:y="11.9cm">
          <draw:text-box>
            <text:p text:style-name="P4"><text:span text:style-name="T16">{{2.2.5}} </text:span></text:p>
          </draw:text-box>
        </draw:frame>
        <draw:polygon draw:style-name="gr3" draw:text-style-name="P3" draw:layer="layout" svg:width="19.869cm" svg:height="0.018cm" svg:x="0.557cm" svg:y="11.819cm" svg:viewBox="0 0 19870 19" draw:points="0,0 19870,0 19870,19 0,19">
          <text:p/>
        </draw:polygon>
        <draw:path draw:style-name="gr3" draw:text-style-name="P3" draw:layer="layout" svg:width="19.887cm" svg:height="0.687cm" svg:x="0.557cm" svg:y="11.819cm" svg:viewBox="0 0 19888 688" svg:d="M19870 0h18v17h-18zM0 17h17v671h-17zM9984 17h18v671h-18zM11933 17h17v671h-17zM13879 17h17v671h-17zM15827 17h17v671h-17zM17847 17h17v671h-17z">
          <text:p/>
        </draw:path>
        <draw:polygon draw:style-name="gr3" draw:text-style-name="P3" draw:layer="layout" svg:width="0.021cm" svg:height="0.67cm" svg:x="20.423cm" svg:y="11.836cm" svg:viewBox="0 0 22 671" draw:points="0,0 22,0 22,671 0,671">
          <text:p/>
        </draw:polygon>
        <draw:frame draw:style-name="gr31" draw:text-style-name="P24" draw:layer="layout" svg:width="1.777cm" svg:height="0.455cm" svg:x="14.45cm" svg:y="11.9cm">
          <draw:text-box>
            <text:p text:style-name="P4"><text:span text:style-name="T16">{{2.3.5}} </text:span></text:p>
          </draw:text-box>
        </draw:frame>
        <draw:frame draw:style-name="gr31" draw:text-style-name="P24" draw:layer="layout" svg:width="1.777cm" svg:height="0.455cm" svg:x="16.395cm" svg:y="11.9cm">
          <draw:text-box>
            <text:p text:style-name="P4"><text:span text:style-name="T16">{{2.4.5}} </text:span></text:p>
          </draw:text-box>
        </draw:frame>
        <draw:frame draw:style-name="gr31" draw:text-style-name="P24" draw:layer="layout" svg:width="1.777cm" svg:height="0.455cm" svg:x="18.415cm" svg:y="11.9cm">
          <draw:text-box>
            <text:p text:style-name="P4"><text:span text:style-name="T16">{{2.5.5}} </text:span></text:p>
          </draw:text-box>
        </draw:frame>
        <draw:frame draw:style-name="gr4" draw:text-style-name="P5" draw:layer="layout" svg:width="10.02cm" svg:height="0.401cm" svg:x="0.576cm" svg:y="12.562cm">
          <draw:text-box>
            <text:p text:style-name="P4"><text:span text:style-name="T7"><text:s/>6. <text:s text:c="2"/>Presentation Skills <text:s text:c="49"/>(4 M) </text:span></text:p>
          </draw:text-box>
        </draw:frame>
        <draw:frame draw:style-name="gr31" draw:text-style-name="P24" draw:layer="layout" svg:width="1.777cm" svg:height="0.455cm" svg:x="10.557cm" svg:y="12.584cm">
          <draw:text-box>
            <text:p text:style-name="P4"><text:span text:style-name="T16">{{2.1.6}} </text:span></text:p>
          </draw:text-box>
        </draw:frame>
        <draw:frame draw:style-name="gr31" draw:text-style-name="P24" draw:layer="layout" svg:width="1.777cm" svg:height="0.455cm" svg:x="12.503cm" svg:y="12.584cm">
          <draw:text-box>
            <text:p text:style-name="P4"><text:span text:style-name="T16">{{2.2.6}} </text:span></text:p>
          </draw:text-box>
        </draw:frame>
        <draw:polygon draw:style-name="gr3" draw:text-style-name="P3" draw:layer="layout" svg:width="19.869cm" svg:height="0.02cm" svg:x="0.557cm" svg:y="12.504cm" svg:viewBox="0 0 19870 21" draw:points="0,0 19870,0 19870,21 0,21">
          <text:p/>
        </draw:polygon>
        <draw:path draw:style-name="gr3" draw:text-style-name="P3" draw:layer="layout" svg:width="19.887cm" svg:height="0.687cm" svg:x="0.557cm" svg:y="12.504cm" svg:viewBox="0 0 19888 688" svg:d="M19870 0h18v17h-18zM0 17h17v671h-17zM9984 17h18v671h-18zM11933 17h17v671h-17zM13879 17h17v671h-17zM15827 17h17v671h-17zM17847 17h17v671h-17z">
          <text:p/>
        </draw:path>
        <draw:polygon draw:style-name="gr3" draw:text-style-name="P3" draw:layer="layout" svg:width="0.021cm" svg:height="0.67cm" svg:x="20.423cm" svg:y="12.521cm" svg:viewBox="0 0 22 671" draw:points="0,0 22,0 22,671 0,671">
          <text:p/>
        </draw:polygon>
        <draw:frame draw:style-name="gr31" draw:text-style-name="P24" draw:layer="layout" svg:width="1.777cm" svg:height="0.455cm" svg:x="14.448cm" svg:y="12.584cm">
          <draw:text-box>
            <text:p text:style-name="P4"><text:span text:style-name="T16">{{2.3.6}} </text:span></text:p>
          </draw:text-box>
        </draw:frame>
        <draw:frame draw:style-name="gr31" draw:text-style-name="P24" draw:layer="layout" svg:width="1.777cm" svg:height="0.455cm" svg:x="16.397cm" svg:y="12.584cm">
          <draw:text-box>
            <text:p text:style-name="P4"><text:span text:style-name="T16">{{2.4.6}} </text:span></text:p>
          </draw:text-box>
        </draw:frame>
        <draw:frame draw:style-name="gr31" draw:text-style-name="P24" draw:layer="layout" svg:width="1.777cm" svg:height="0.455cm" svg:x="18.417cm" svg:y="12.584cm">
          <draw:text-box>
            <text:p text:style-name="P4"><text:span text:style-name="T16">{{2.5.6}} </text:span></text:p>
          </draw:text-box>
        </draw:frame>
        <draw:frame draw:style-name="gr4" draw:text-style-name="P5" draw:layer="layout" svg:width="10.057cm" svg:height="0.401cm" svg:x="0.576cm" svg:y="13.247cm">
          <draw:text-box>
            <text:p text:style-name="P4"><text:span text:style-name="T7"><text:s/>7. <text:s text:c="2"/>Question and Answer <text:s text:c="44"/>(4 M) </text:span></text:p>
          </draw:text-box>
        </draw:frame>
        <draw:frame draw:style-name="gr31" draw:text-style-name="P24" draw:layer="layout" svg:width="1.777cm" svg:height="0.455cm" svg:x="10.557cm" svg:y="13.268cm">
          <draw:text-box>
            <text:p text:style-name="P4"><text:span text:style-name="T16">{{2.1.7}} </text:span></text:p>
          </draw:text-box>
        </draw:frame>
        <draw:frame draw:style-name="gr31" draw:text-style-name="P24" draw:layer="layout" svg:width="1.777cm" svg:height="0.455cm" svg:x="12.503cm" svg:y="13.268cm">
          <draw:text-box>
            <text:p text:style-name="P4"><text:span text:style-name="T16">{{2.2.7}} </text:span></text:p>
          </draw:text-box>
        </draw:frame>
        <draw:polygon draw:style-name="gr3" draw:text-style-name="P3" draw:layer="layout" svg:width="19.869cm" svg:height="0.02cm" svg:x="0.557cm" svg:y="13.191cm" svg:viewBox="0 0 19870 21" draw:points="0,0 19870,0 19870,21 0,21">
          <text:p/>
        </draw:polygon>
        <draw:path draw:style-name="gr3" draw:text-style-name="P3" draw:layer="layout" svg:width="19.887cm" svg:height="0.678cm" svg:x="0.557cm" svg:y="13.191cm" svg:viewBox="0 0 19888 679" svg:d="M19870 0h18v17h-18zM0 17h17v662h-17zM9984 17h18v662h-18zM11933 17h17v662h-17zM13879 17h17v662h-17zM15827 17h17v662h-17zM17847 17h17v662h-17z">
          <text:p/>
        </draw:path>
        <draw:polygon draw:style-name="gr3" draw:text-style-name="P3" draw:layer="layout" svg:width="0.021cm" svg:height="0.661cm" svg:x="20.423cm" svg:y="13.208cm" svg:viewBox="0 0 22 662" draw:points="0,0 22,0 22,662 0,662">
          <text:p/>
        </draw:polygon>
        <draw:frame draw:style-name="gr31" draw:text-style-name="P24" draw:layer="layout" svg:width="1.777cm" svg:height="0.455cm" svg:x="14.448cm" svg:y="13.268cm">
          <draw:text-box>
            <text:p text:style-name="P4"><text:span text:style-name="T16">{{2.3.7}} </text:span></text:p>
          </draw:text-box>
        </draw:frame>
        <draw:frame draw:style-name="gr31" draw:text-style-name="P24" draw:layer="layout" svg:width="1.777cm" svg:height="0.455cm" svg:x="16.397cm" svg:y="13.268cm">
          <draw:text-box>
            <text:p text:style-name="P4"><text:span text:style-name="T16">{{2.4.7}} </text:span></text:p>
          </draw:text-box>
        </draw:frame>
        <draw:frame draw:style-name="gr31" draw:text-style-name="P24" draw:layer="layout" svg:width="1.777cm" svg:height="0.455cm" svg:x="18.417cm" svg:y="13.268cm">
          <draw:text-box>
            <text:p text:style-name="P4"><text:span text:style-name="T16">{{2.5.7}} </text:span></text:p>
          </draw:text-box>
        </draw:frame>
        <draw:frame draw:style-name="gr32" draw:text-style-name="P23" draw:layer="layout" svg:width="9.585cm" svg:height="0.384cm" svg:x="0.576cm" svg:y="13.931cm">
          <draw:text-box>
            <text:p text:style-name="P4"><text:span text:style-name="T13"><text:s/>8. <text:s text:c="2"/>Summarization of ultimate findings of the Project </text:span></text:p>
          </draw:text-box>
        </draw:frame>
        <draw:frame draw:style-name="gr31" draw:text-style-name="P24" draw:layer="layout" svg:width="1.777cm" svg:height="0.455cm" svg:x="10.557cm" svg:y="13.949cm">
          <draw:text-box>
            <text:p text:style-name="P4"><text:span text:style-name="T16">{{2.1.8}} </text:span></text:p>
          </draw:text-box>
        </draw:frame>
        <draw:frame draw:style-name="gr31" draw:text-style-name="P24" draw:layer="layout" svg:width="1.777cm" svg:height="0.455cm" svg:x="12.503cm" svg:y="13.949cm">
          <draw:text-box>
            <text:p text:style-name="P4"><text:span text:style-name="T16">{{2.2.8}} </text:span></text:p>
          </draw:text-box>
        </draw:frame>
        <draw:polygon draw:style-name="gr3" draw:text-style-name="P3" draw:layer="layout" svg:width="19.869cm" svg:height="0.018cm" svg:x="0.557cm" svg:y="13.868cm" svg:viewBox="0 0 19870 19" draw:points="0,0 19870,0 19870,19 0,19">
          <text:p/>
        </draw:polygon>
        <draw:path draw:style-name="gr3" draw:text-style-name="P3" draw:layer="layout" svg:width="19.887cm" svg:height="0.688cm" svg:x="0.557cm" svg:y="13.868cm" svg:viewBox="0 0 19888 689" svg:d="M19870 0h18v17h-18zM0 17h17v672h-17zM9984 17h18v672h-18zM11933 17h17v672h-17zM13879 17h17v672h-17zM15827 17h17v672h-17zM17847 17h17v672h-17z">
          <text:p/>
        </draw:path>
        <draw:polygon draw:style-name="gr3" draw:text-style-name="P3" draw:layer="layout" svg:width="0.021cm" svg:height="0.671cm" svg:x="20.423cm" svg:y="13.885cm" svg:viewBox="0 0 22 672" draw:points="0,0 22,0 22,672 0,672">
          <text:p/>
        </draw:polygon>
        <draw:polygon draw:style-name="gr34" draw:text-style-name="P26" draw:layer="layout" svg:width="9.961cm" svg:height="0.797cm" svg:x="0.579cm" svg:y="14.57cm" svg:viewBox="0 0 9962 798" draw:points="0,0 9962,0 9962,798 0,798">
          <text:p/>
        </draw:polygon>
        <draw:frame draw:style-name="gr31" draw:text-style-name="P24" draw:layer="layout" svg:width="1.777cm" svg:height="0.455cm" svg:x="14.448cm" svg:y="13.949cm">
          <draw:text-box>
            <text:p text:style-name="P4"><text:span text:style-name="T16">{{2.3.8}} </text:span></text:p>
          </draw:text-box>
        </draw:frame>
        <draw:frame draw:style-name="gr31" draw:text-style-name="P24" draw:layer="layout" svg:width="1.777cm" svg:height="0.455cm" svg:x="16.397cm" svg:y="13.949cm">
          <draw:text-box>
            <text:p text:style-name="P4"><text:span text:style-name="T16">{{2.4.8}} </text:span></text:p>
          </draw:text-box>
        </draw:frame>
        <draw:polygon draw:style-name="gr34" draw:text-style-name="P26" draw:layer="layout" svg:width="1.928cm" svg:height="0.797cm" svg:x="10.561cm" svg:y="14.57cm" svg:viewBox="0 0 1929 798" draw:points="0,0 1929,0 1929,798 0,798">
          <text:p/>
        </draw:polygon>
        <draw:polygon draw:style-name="gr34" draw:text-style-name="P26" draw:layer="layout" svg:width="1.932cm" svg:height="0.797cm" svg:x="12.503cm" svg:y="14.57cm" svg:viewBox="0 0 1933 798" draw:points="0,0 1933,0 1933,798 0,798">
          <text:p/>
        </draw:polygon>
        <draw:polygon draw:style-name="gr34" draw:text-style-name="P26" draw:layer="layout" svg:width="1.931cm" svg:height="0.797cm" svg:x="14.452cm" svg:y="14.57cm" svg:viewBox="0 0 1932 798" draw:points="0,0 1932,0 1932,798 0,798">
          <text:p/>
        </draw:polygon>
        <draw:polygon draw:style-name="gr34" draw:text-style-name="P26" draw:layer="layout" svg:width="2.007cm" svg:height="0.797cm" svg:x="16.399cm" svg:y="14.57cm" svg:viewBox="0 0 2008 798" draw:points="0,0 2008,0 2008,798 0,798">
          <text:p/>
        </draw:polygon>
        <draw:polygon draw:style-name="gr34" draw:text-style-name="P26" draw:layer="layout" svg:width="2.003cm" svg:height="0.797cm" svg:x="18.423cm" svg:y="14.57cm" svg:viewBox="0 0 2004 798" draw:points="0,0 2004,0 2004,798 0,798">
          <text:p/>
        </draw:polygon>
        <draw:frame draw:style-name="gr31" draw:text-style-name="P24" draw:layer="layout" svg:width="1.777cm" svg:height="0.455cm" svg:x="18.417cm" svg:y="13.949cm">
          <draw:text-box>
            <text:p text:style-name="P4"><text:span text:style-name="T16">{{2.5.8}} </text:span></text:p>
          </draw:text-box>
        </draw:frame>
        <draw:polygon draw:style-name="gr3" draw:text-style-name="P3" draw:layer="layout" svg:width="19.869cm" svg:height="0.02cm" svg:x="0.557cm" svg:y="14.553cm" svg:viewBox="0 0 19870 21" draw:points="0,0 19870,0 19870,21 0,21">
          <text:p/>
        </draw:polygon>
        <draw:path draw:style-name="gr3" draw:text-style-name="P3" draw:layer="layout" svg:width="19.887cm" svg:height="0.814cm" svg:x="0.557cm" svg:y="14.553cm" svg:viewBox="0 0 19888 815" svg:d="M19870 0h18v17h-18zM0 17h17v798h-17zM9984 17h18v798h-18zM11933 17h17v798h-17zM13879 17h17v798h-17zM15827 17h17v798h-17zM17847 17h17v798h-17z">
          <text:p/>
        </draw:path>
        <draw:polygon draw:style-name="gr3" draw:text-style-name="P3" draw:layer="layout" svg:width="0.021cm" svg:height="0.797cm" svg:x="20.423cm" svg:y="14.57cm" svg:viewBox="0 0 22 798" draw:points="0,0 22,0 22,798 0,798">
          <text:p/>
        </draw:polygon>
        <draw:frame draw:style-name="gr31" draw:text-style-name="P24" draw:layer="layout" svg:width="2.413cm" svg:height="0.455cm" svg:x="8.255cm" svg:y="14.63cm">
          <draw:text-box>
            <text:p text:style-name="P4"><text:span text:style-name="T17">Total (25M)</text:span></text:p>
          </draw:text-box>
        </draw:frame>
        <draw:frame draw:style-name="gr31" draw:text-style-name="P24" draw:layer="layout" svg:width="10.001cm" svg:height="0.455cm" svg:x="10.389cm" svg:y="14.63cm">
          <draw:text-box>
            <text:p text:style-name="P4"><text:span text:style-name="T16"><text:s text:c="2"/>{{2.1.s1}} <text:s/>{{2.2.s1}} <text:s/>{{2.3.s1}} <text:s/>{{2.4.s1}} {{2.5.s1}} </text:span></text:p>
          </draw:text-box>
        </draw:frame>
        <draw:polygon draw:style-name="gr3" draw:text-style-name="P3" draw:layer="layout" svg:width="19.869cm" svg:height="0.018cm" svg:x="0.557cm" svg:y="15.366cm" svg:viewBox="0 0 19870 19" draw:points="0,0 19870,0 19870,19 0,19">
          <text:p/>
        </draw:polygon>
        <draw:polygon draw:style-name="gr3" draw:text-style-name="P3" draw:layer="layout" svg:width="0.021cm" svg:height="0.018cm" svg:x="20.423cm" svg:y="15.366cm" svg:viewBox="0 0 22 19" draw:points="0,0 22,0 22,19 0,19">
          <text:p/>
        </draw:polygon>
        <draw:polygon draw:style-name="gr3" draw:text-style-name="P3" draw:layer="layout" svg:width="0.02cm" svg:height="1.251cm" svg:x="0.557cm" svg:y="15.383cm" svg:viewBox="0 0 21 1252" draw:points="0,0 21,0 21,1252 0,1252">
          <text:p/>
        </draw:polygon>
        <draw:polygon draw:style-name="gr3" draw:text-style-name="P3" draw:layer="layout" svg:width="17.857cm" svg:height="0.02cm" svg:x="0.557cm" svg:y="16.614cm" svg:viewBox="0 0 17858 21" draw:points="0,0 17858,0 17858,21 0,21">
          <text:p/>
        </draw:polygon>
        <draw:polygon draw:style-name="gr3" draw:text-style-name="P3" draw:layer="layout" svg:width="2.009cm" svg:height="0.02cm" svg:x="18.417cm" svg:y="16.614cm" svg:viewBox="0 0 2010 21" draw:points="0,0 2010,0 2010,21 0,21">
          <text:p/>
        </draw:polygon>
        <draw:polygon draw:style-name="gr3" draw:text-style-name="P3" draw:layer="layout" svg:width="0.021cm" svg:height="1.251cm" svg:x="20.423cm" svg:y="15.383cm" svg:viewBox="0 0 22 1252" draw:points="0,0 22,0 22,1252 0,1252">
          <text:p/>
        </draw:polygon>
        <draw:polygon draw:style-name="gr3" draw:text-style-name="P3" draw:layer="layout" svg:width="0.021cm" svg:height="0.02cm" svg:x="20.423cm" svg:y="16.614cm" svg:viewBox="0 0 22 21" draw:points="0,0 22,0 22,21 0,21">
          <text:p/>
        </draw:polygon>
        <draw:frame draw:style-name="gr31" draw:text-style-name="P24" draw:layer="layout" svg:width="3.974cm" svg:height="0.455cm" svg:x="0.584cm" svg:y="15.453cm">
          <draw:text-box>
            <text:p text:style-name="P4"><text:span text:style-name="T16"><text:s/>Comments (if any) :</text:span></text:p>
          </draw:text-box>
        </draw:frame>
        <draw:frame draw:style-name="gr31" draw:text-style-name="P24" draw:layer="layout" svg:width="1.606cm" svg:height="0.455cm" svg:x="4.453cm" svg:y="15.443cm">
          <draw:text-box>
            <text:p text:style-name="P4"><text:span text:style-name="T16"><text:s text:c="2"/>{{2.c}} </text:span></text:p>
          </draw:text-box>
        </draw:frame>
        <draw:frame draw:style-name="gr31" draw:text-style-name="P22" draw:layer="layout" svg:width="0.412cm" svg:height="0.455cm" svg:x="18.419cm" svg:y="15.349cm">
          <draw:text-box>
            <text:p text:style-name="P4"><text:span text:style-name="T16"><text:s/></text:span></text:p>
          </draw:text-box>
        </draw:frame>
        <draw:frame draw:style-name="gr31" draw:text-style-name="P22" draw:layer="layout" svg:width="0.412cm" svg:height="0.455cm" svg:x="1.676cm" svg:y="16.586cm">
          <draw:text-box>
            <text:p text:style-name="P4"><text:span text:style-name="T16"><text:s/></text:span></text:p>
          </draw:text-box>
        </draw:frame>
        <draw:frame draw:style-name="gr35" draw:text-style-name="P27" draw:layer="layout" svg:width="7.357cm" svg:height="0.336cm" svg:x="1.676cm" svg:y="17.092cm">
          <draw:text-box>
            <text:p text:style-name="P4"><text:span text:style-name="T19"># To be filled by internal guide &amp; reviewer(s) only. </text:span></text:p>
          </draw:text-box>
        </draw:frame>
        <draw:frame draw:style-name="gr35" draw:text-style-name="P27" draw:layer="layout" svg:width="16.924cm" svg:height="0.336cm" svg:x="1.676cm" svg:y="17.452cm">
          <draw:text-box>
            <text:p text:style-name="P4"><text:span text:style-name="T19">* Whether the presentation / evaluation is as per the schedule. : YES / NO (If NO mention the reasons for the same.) </text:span></text:p>
          </draw:text-box>
        </draw:frame>
        <draw:frame draw:style-name="gr36" draw:text-style-name="P28" draw:layer="layout" svg:width="0.444cm" svg:height="0.485cm" svg:x="1.676cm" svg:y="17.813cm">
          <draw:text-box>
            <text:p text:style-name="P4"><text:span text:style-name="T20"><text:s/></text:span></text:p>
          </draw:text-box>
        </draw:frame>
        <draw:frame draw:style-name="gr31" draw:text-style-name="P22" draw:layer="layout" svg:width="4.792cm" svg:height="0.455cm" svg:x="1.676cm" svg:y="18.351cm">
          <draw:text-box>
            <text:p text:style-name="P4"><text:span text:style-name="T21">Review – II: Deliverables</text:span></text:p>
          </draw:text-box>
        </draw:frame>
        <draw:frame draw:style-name="gr31" draw:text-style-name="P22" draw:layer="layout" svg:width="0.412cm" svg:height="0.455cm" svg:x="6.109cm" svg:y="18.341cm">
          <draw:text-box>
            <text:p text:style-name="P4"><text:span text:style-name="T16"><text:s/></text:span></text:p>
          </draw:text-box>
        </draw:frame>
        <draw:frame draw:style-name="gr37" draw:text-style-name="P29" draw:layer="layout" svg:width="0.376cm" svg:height="0.411cm" svg:x="1.676cm" svg:y="18.825cm">
          <draw:text-box>
            <text:p text:style-name="P4"><text:span text:style-name="T22"><text:s/></text:span></text:p>
          </draw:text-box>
        </draw:frame>
        <draw:frame draw:style-name="gr37" draw:text-style-name="P29" draw:layer="layout" svg:width="0.376cm" svg:height="0.411cm" svg:x="1.676cm" svg:y="19.273cm">
          <draw:text-box>
            <text:p text:style-name="P4"><text:span text:style-name="T22"><text:s/></text:span></text:p>
          </draw:text-box>
        </draw:frame>
        <draw:frame draw:style-name="gr37" draw:text-style-name="P29" draw:layer="layout" svg:width="0.376cm" svg:height="0.411cm" svg:x="1.676cm" svg:y="19.722cm">
          <draw:text-box>
            <text:p text:style-name="P4"><text:span text:style-name="T22"><text:s/></text:span></text:p>
          </draw:text-box>
        </draw:frame>
        <draw:frame draw:style-name="gr37" draw:text-style-name="P29" draw:layer="layout" svg:width="0.376cm" svg:height="0.411cm" svg:x="1.676cm" svg:y="20.171cm">
          <draw:text-box>
            <text:p text:style-name="P4"><text:span text:style-name="T22"><text:s/></text:span></text:p>
          </draw:text-box>
        </draw:frame>
        <draw:frame draw:style-name="gr37" draw:text-style-name="P29" draw:layer="layout" svg:width="0.376cm" svg:height="0.411cm" svg:x="1.676cm" svg:y="20.619cm">
          <draw:text-box>
            <text:p text:style-name="P4"><text:span text:style-name="T22"><text:s/></text:span></text:p>
          </draw:text-box>
        </draw:frame>
        <draw:frame draw:style-name="gr37" draw:text-style-name="P29" draw:layer="layout" svg:width="0.376cm" svg:height="0.411cm" svg:x="1.676cm" svg:y="21.068cm">
          <draw:text-box>
            <text:p text:style-name="P4"><text:span text:style-name="T22"><text:s/></text:span></text:p>
          </draw:text-box>
        </draw:frame>
        <draw:frame draw:style-name="gr37" draw:text-style-name="P29" draw:layer="layout" svg:width="0.376cm" svg:height="0.411cm" svg:x="1.676cm" svg:y="21.517cm">
          <draw:text-box>
            <text:p text:style-name="P4"><text:span text:style-name="T22"><text:s/></text:span></text:p>
          </draw:text-box>
        </draw:frame>
        <draw:frame draw:style-name="gr37" draw:text-style-name="P29" draw:layer="layout" svg:width="0.376cm" svg:height="0.411cm" svg:x="1.676cm" svg:y="21.966cm">
          <draw:text-box>
            <text:p text:style-name="P4"><text:span text:style-name="T22"><text:s/></text:span></text:p>
          </draw:text-box>
        </draw:frame>
        <draw:frame draw:style-name="gr2" draw:text-style-name="P2" draw:layer="layout" svg:width="15.423cm" svg:height="3.498cm" svg:x="3.073cm" svg:y="2.724cm">
          <draw:image xlink:href="Pictures/100000000000025700000088DC5928DA.jpg" xlink:type="simple" xlink:show="embed" xlink:actuate="onLoad" draw:mime-type="image/jpeg">
            <text:p/>
          </draw:image>
        </draw:frame>
        <draw:polygon draw:style-name="gr1" draw:text-style-name="P1" draw:layer="layout" svg:width="7.993cm" svg:height="3.17cm" svg:x="11.747cm" svg:y="19.136cm" svg:viewBox="0 0 7994 3171" draw:points="0,0 7994,0 7994,3171 0,3171">
          <text:p/>
        </draw:polygon>
        <draw:polygon draw:style-name="gr5" draw:text-style-name="P2" draw:layer="layout" svg:width="7.993cm" svg:height="3.17cm" svg:x="11.747cm" svg:y="19.136cm" svg:viewBox="0 0 7994 3171" draw:points="0,0 7994,0 7994,3171 0,3171">
          <text:p/>
        </draw:polygon>
        <draw:frame draw:style-name="gr37" draw:text-style-name="P29" draw:layer="layout" svg:width="0.376cm" svg:height="0.411cm" svg:x="1.676cm" svg:y="22.419cm">
          <draw:text-box>
            <text:p text:style-name="P4"><text:span text:style-name="T22"><text:s/></text:span></text:p>
          </draw:text-box>
        </draw:frame>
        <draw:frame draw:style-name="gr37" draw:text-style-name="P29" draw:layer="layout" svg:width="0.376cm" svg:height="0.411cm" svg:x="1.676cm" svg:y="22.867cm">
          <draw:text-box>
            <text:p text:style-name="P4"><text:span text:style-name="T22"><text:s/></text:span></text:p>
          </draw:text-box>
        </draw:frame>
        <draw:frame draw:style-name="gr31" draw:text-style-name="P22" draw:layer="layout" svg:width="0.412cm" svg:height="0.455cm" svg:x="1.405cm" svg:y="23.311cm">
          <draw:text-box>
            <text:p text:style-name="P4"><text:span text:style-name="T16"><text:s/></text:span></text:p>
          </draw:text-box>
        </draw:frame>
        <draw:frame draw:style-name="gr31" draw:text-style-name="P22" draw:layer="layout" svg:width="3.49cm" svg:height="0.455cm" svg:x="11.997cm" svg:y="19.218cm">
          <draw:text-box>
            <text:p text:style-name="P4"><text:span text:style-name="T16">Modules Split-up </text:span></text:p>
          </draw:text-box>
        </draw:frame>
        <draw:frame draw:style-name="gr31" draw:text-style-name="P22" draw:layer="layout" svg:width="3.597cm" svg:height="0.455cm" svg:x="11.997cm" svg:y="19.693cm">
          <draw:text-box>
            <text:p text:style-name="P4"><text:span text:style-name="T16">Proposed System </text:span></text:p>
          </draw:text-box>
        </draw:frame>
        <draw:frame draw:style-name="gr7" draw:text-style-name="P7" draw:layer="layout" svg:width="7.605cm" svg:height="0.424cm" svg:x="11.997cm" svg:y="20.192cm">
          <draw:text-box>
            <text:p text:style-name="P4"><text:span text:style-name="T12">Software Tools / Technologies to be used</text:span></text:p>
          </draw:text-box>
        </draw:frame>
        <draw:frame draw:style-name="gr31" draw:text-style-name="P22" draw:layer="layout" svg:width="0.412cm" svg:height="0.455cm" svg:x="19.498cm" svg:y="20.165cm">
          <draw:text-box>
            <text:p text:style-name="P4"><text:span text:style-name="T16"><text:s/></text:span></text:p>
          </draw:text-box>
        </draw:frame>
        <draw:frame draw:style-name="gr31" draw:text-style-name="P22" draw:layer="layout" svg:width="4.188cm" svg:height="0.455cm" svg:x="11.997cm" svg:y="20.641cm">
          <draw:text-box>
            <text:p text:style-name="P4"><text:span text:style-name="T16">Proposed Outcomes </text:span></text:p>
          </draw:text-box>
        </draw:frame>
        <draw:polygon draw:style-name="gr1" draw:text-style-name="P1" draw:layer="layout" svg:width="9.39cm" svg:height="3.17cm" svg:x="1.959cm" svg:y="19.136cm" svg:viewBox="0 0 9391 3171" draw:points="0,0 9391,0 9391,3171 0,3171">
          <text:p/>
        </draw:polygon>
        <draw:polygon draw:style-name="gr5" draw:text-style-name="P2" draw:layer="layout" svg:width="9.39cm" svg:height="3.17cm" svg:x="1.959cm" svg:y="19.136cm" svg:viewBox="0 0 9391 3171" draw:points="0,0 9391,0 9391,3171 0,3171">
          <text:p/>
        </draw:polygon>
        <draw:frame draw:style-name="gr31" draw:text-style-name="P22" draw:layer="layout" svg:width="5.649cm" svg:height="0.455cm" svg:x="11.997cm" svg:y="21.115cm">
          <draw:text-box>
            <text:p text:style-name="P4"><text:span text:style-name="T16">Partial Report (Semester – I) </text:span></text:p>
          </draw:text-box>
        </draw:frame>
        <draw:frame draw:style-name="gr31" draw:text-style-name="P22" draw:layer="layout" svg:width="3.224cm" svg:height="0.455cm" svg:x="11.997cm" svg:y="21.588cm">
          <draw:text-box>
            <text:p text:style-name="P4"><text:span text:style-name="T16">Project Plan 2.0 </text:span></text:p>
          </draw:text-box>
        </draw:frame>
        <draw:frame draw:style-name="gr37" draw:text-style-name="P29" draw:layer="layout" svg:width="0.376cm" svg:height="0.411cm" svg:x="11.997cm" svg:y="22.063cm">
          <draw:text-box>
            <text:p text:style-name="P4"><text:span text:style-name="T22"><text:s/></text:span></text:p>
          </draw:text-box>
        </draw:frame>
        <draw:frame draw:style-name="gr31" draw:text-style-name="P22" draw:layer="layout" svg:width="11.238cm" svg:height="0.455cm" svg:x="2.214cm" svg:y="19.218cm">
          <draw:text-box>
            <text:p text:style-name="P4"><text:span text:style-name="T16">Problem Statement / Title <text:s text:c="56"/></text:span></text:p>
          </draw:text-box>
        </draw:frame>
        <draw:frame draw:style-name="gr31" draw:text-style-name="P22" draw:layer="layout" svg:width="1.726cm" svg:height="0.455cm" svg:x="2.214cm" svg:y="19.693cm">
          <draw:text-box>
            <text:p text:style-name="P4"><text:span text:style-name="T16">Abstract</text:span></text:p>
          </draw:text-box>
        </draw:frame>
        <draw:frame draw:style-name="gr37" draw:text-style-name="P29" draw:layer="layout" svg:width="0.376cm" svg:height="0.411cm" svg:x="3.611cm" svg:y="19.688cm">
          <draw:text-box>
            <text:p text:style-name="P4"><text:span text:style-name="T22"><text:s/></text:span></text:p>
          </draw:text-box>
        </draw:frame>
        <draw:frame draw:style-name="gr31" draw:text-style-name="P22" draw:layer="layout" svg:width="2.548cm" svg:height="0.455cm" svg:x="2.214cm" svg:y="20.165cm">
          <draw:text-box>
            <text:p text:style-name="P4"><text:span text:style-name="T16">Introduction</text:span></text:p>
          </draw:text-box>
        </draw:frame>
        <draw:frame draw:style-name="gr37" draw:text-style-name="P29" draw:layer="layout" svg:width="0.376cm" svg:height="0.411cm" svg:x="4.25cm" svg:y="20.162cm">
          <draw:text-box>
            <text:p text:style-name="P4"><text:span text:style-name="T22"><text:s/></text:span></text:p>
          </draw:text-box>
        </draw:frame>
        <draw:frame draw:style-name="gr31" draw:text-style-name="P22" draw:layer="layout" svg:width="3.555cm" svg:height="0.455cm" svg:x="2.214cm" svg:y="20.641cm">
          <draw:text-box>
            <text:p text:style-name="P4"><text:span text:style-name="T16">Literature Survey </text:span></text:p>
          </draw:text-box>
        </draw:frame>
        <draw:frame draw:style-name="gr37" draw:text-style-name="P29" draw:layer="layout" svg:width="0.376cm" svg:height="0.411cm" svg:x="10.897cm" svg:y="20.636cm">
          <draw:text-box>
            <text:p text:style-name="P4"><text:span text:style-name="T22"><text:s/></text:span></text:p>
          </draw:text-box>
        </draw:frame>
        <draw:frame draw:style-name="gr31" draw:text-style-name="P22" draw:layer="layout" svg:width="2.702cm" svg:height="0.455cm" svg:x="2.214cm" svg:y="21.115cm">
          <draw:text-box>
            <text:p text:style-name="P4"><text:span text:style-name="T16">Methodology</text:span></text:p>
          </draw:text-box>
        </draw:frame>
        <draw:polygon draw:style-name="gr1" draw:text-style-name="P1" draw:layer="layout" svg:width="18.04cm" svg:height="1.689cm" svg:x="1.835cm" svg:y="22.741cm" svg:viewBox="0 0 18041 1690" draw:points="0,0 18041,0 18041,1690 0,1690">
          <text:p/>
        </draw:polygon>
        <draw:polygon draw:style-name="gr38" draw:text-style-name="P2" draw:layer="layout" svg:width="18.04cm" svg:height="1.689cm" svg:x="1.835cm" svg:y="22.741cm" svg:viewBox="0 0 18041 1690" draw:points="0,0 18041,0 18041,1690 0,1690">
          <text:p/>
        </draw:polygon>
        <draw:frame draw:style-name="gr37" draw:text-style-name="P29" draw:layer="layout" svg:width="0.376cm" svg:height="0.411cm" svg:x="4.432cm" svg:y="21.111cm">
          <draw:text-box>
            <text:p text:style-name="P4"><text:span text:style-name="T22"><text:s/></text:span></text:p>
          </draw:text-box>
        </draw:frame>
        <draw:frame draw:style-name="gr31" draw:text-style-name="P22" draw:layer="layout" svg:width="7.514cm" svg:height="0.455cm" svg:x="2.214cm" svg:y="21.588cm">
          <draw:text-box>
            <text:p text:style-name="P4"><text:span text:style-name="T16">Design / algorithms / techniques used</text:span></text:p>
          </draw:text-box>
        </draw:frame>
        <draw:frame draw:style-name="gr37" draw:text-style-name="P29" draw:layer="layout" svg:width="0.376cm" svg:height="0.411cm" svg:x="8.403cm" svg:y="21.585cm">
          <draw:text-box>
            <text:p text:style-name="P4"><text:span text:style-name="T22"><text:s/></text:span></text:p>
          </draw:text-box>
        </draw:frame>
        <draw:frame draw:style-name="gr31" draw:text-style-name="P22" draw:layer="layout" svg:width="16.916cm" svg:height="0.455cm" svg:x="2.091cm" svg:y="22.825cm">
          <draw:text-box>
            <text:p text:style-name="P4"><text:span text:style-name="T16">Name of Reviewer 1 <text:s text:c="19"/>Name of Reviewer 2 <text:s text:c="19"/>Name of Internal Guide </text:span></text:p>
          </draw:text-box>
        </draw:frame>
        <draw:frame draw:style-name="gr31" draw:text-style-name="P22" draw:layer="layout" svg:width="14.126cm" svg:height="0.455cm" svg:x="2.091cm" svg:y="23.3cm">
          <draw:text-box>
            <text:p text:style-name="P4"><text:span text:style-name="T16"><text:s text:c="130"/></text:span></text:p>
          </draw:text-box>
        </draw:frame>
        <draw:frame draw:style-name="gr37" draw:text-style-name="P29" draw:layer="layout" svg:width="2.859cm" svg:height="0.411cm" svg:x="14.388cm" svg:y="23.811cm">
          <draw:text-box>
            <text:p text:style-name="P4"><text:span text:style-name="T22">{{guide_name}}</text:span></text:p>
          </draw:text-box>
        </draw:frame>
        <draw:frame draw:style-name="gr31" draw:text-style-name="P22" draw:layer="layout" svg:width="7.115cm" svg:height="0.455cm" svg:x="18.059cm" svg:y="23.3cm">
          <draw:text-box>
            <text:p text:style-name="P4"><text:span text:style-name="T16"><text:s text:c="65"/></text:span></text:p>
          </draw:text-box>
        </draw:frame>
        <draw:frame draw:style-name="gr31" draw:text-style-name="P22" draw:layer="layout" svg:width="14.666cm" svg:height="0.455cm" svg:x="2.091cm" svg:y="23.736cm">
          <draw:text-box>
            <text:p text:style-name="P4"><text:span text:style-name="T16"><text:s text:c="135"/></text:span></text:p>
          </draw:text-box>
        </draw:frame>
        <draw:frame draw:style-name="gr39" draw:text-style-name="P9" draw:layer="layout" svg:width="2.744cm" svg:height="0.422cm" svg:x="2.12cm" svg:y="23.812cm">
          <draw:text-box>
            <text:p text:style-name="P4"><text:span text:style-name="T23">{{r1_name}} </text:span></text:p>
          </draw:text-box>
        </draw:frame>
        <draw:frame draw:style-name="gr39" draw:text-style-name="P9" draw:layer="layout" svg:width="2.744cm" svg:height="0.422cm" svg:x="8.153cm" svg:y="23.812cm">
          <draw:text-box>
            <text:p text:style-name="P4"><text:span text:style-name="T23">{{r2_name}}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-dash="Dash_20_Dot_20_4"/>
      <style:paragraph-properties fo:margin-left="0cm" fo:margin-right="0.102cm" fo:margin-top="0.102cm" fo:margin-bottom="0cm" fo:line-height="80%" fo:text-indent="0cm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09-15T18:24:11.975019058</meta:print-date>
    <meta:printed-by>PDF files</meta:printed-by>
    <dc:date>2025-09-15T20:05:28.456288957</dc:date>
    <meta:editing-duration>PT1H42M1S</meta:editing-duration>
    <meta:editing-cycles>4</meta:editing-cycles>
    <meta:generator>LibreOffice/25.2.5.2$Linux_X86_64 LibreOffice_project/520$Build-2</meta:generator>
    <meta:document-statistic meta:object-count="431"/>
  </office:meta>
</office:document-meta>
</file>